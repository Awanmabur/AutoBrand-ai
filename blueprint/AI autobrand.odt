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MS Gothic" style:font-name-asian="MS Gothic" style:font-name-complex="MS Gothic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MS Gothic" style:font-name-asian="MS Gothic" style:font-name-complex="MS Gothic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MS Gothic" style:font-name-asian="MS Gothic" style:font-name-complex="MS Gothic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MS Gothic" style:font-name-asian="MS Gothic" style:font-name-complex="MS Gothic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DefaultParagraphFont" style:family="text">
      <style:text-properties style:font-name="MS Gothic" style:font-name-asian="MS Gothic" style:font-name-complex="MS Gothic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MS Gothic" style:font-name-asian="MS Gothic" style:font-name-complex="MS Gothic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MS Gothic" style:font-name-asian="MS Gothic" style:font-name-complex="MS Gothic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MS Gothic" style:font-name-asian="MS Gothic" style:font-name-complex="MS Gothic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DefaultParagraphFont" style:family="text">
      <style:text-properties style:font-name="MS Gothic" style:font-name-asian="MS Gothic" style:font-name-complex="MS Gothic"/>
    </style:style>
    <style:style style:name="T82" style:parent-style-name="DefaultParagraphFont" style:family="text">
      <style:text-properties style:font-name="Calibri" style:font-name-complex="Calibri"/>
    </style:style>
    <style:style style:name="T83" style:parent-style-name="DefaultParagraphFont" style:family="text">
      <style:text-properties style:font-name="MS Gothic" style:font-name-asian="MS Gothic" style:font-name-complex="MS Gothic"/>
    </style:style>
    <style:style style:name="T84" style:parent-style-name="DefaultParagraphFont" style:family="text">
      <style:text-properties style:font-name="Calibri" style:font-name-complex="Calibri"/>
    </style:style>
    <style:style style:name="T85" style:parent-style-name="DefaultParagraphFont" style:family="text">
      <style:text-properties style:font-name="MS Gothic" style:font-name-asian="MS Gothic" style:font-name-complex="MS Gothic"/>
    </style:style>
    <style:style style:name="T86" style:parent-style-name="DefaultParagraphFont" style:family="text">
      <style:text-properties style:font-name="Calibri" style:font-name-complex="Calibri"/>
    </style:style>
    <style:style style:name="T87" style:parent-style-name="DefaultParagraphFont" style:family="text">
      <style:text-properties style:font-name="MS Gothic" style:font-name-asian="MS Gothic" style:font-name-complex="MS Gothic"/>
    </style:style>
    <style:style style:name="T88" style:parent-style-name="DefaultParagraphFont" style:family="text">
      <style:text-properties style:font-name="Calibri" style:font-name-complex="Calibri"/>
    </style:style>
    <style:style style:name="T89" style:parent-style-name="DefaultParagraphFont" style:family="text">
      <style:text-properties style:font-name="MS Gothic" style:font-name-asian="MS Gothic" style:font-name-complex="MS Gothic"/>
    </style:style>
    <style:style style:name="T90" style:parent-style-name="DefaultParagraphFont" style:family="text">
      <style:text-properties style:font-name="Calibri" style:font-name-complex="Calibri"/>
    </style:style>
    <style:style style:name="T91" style:parent-style-name="DefaultParagraphFont" style:family="text">
      <style:text-properties style:font-name="MS Gothic" style:font-name-asian="MS Gothic" style:font-name-complex="MS Gothic"/>
    </style:style>
    <style:style style:name="T92" style:parent-style-name="DefaultParagraphFont" style:family="text">
      <style:text-properties style:font-name="Calibri" style:font-name-complex="Calibri"/>
    </style:style>
    <style:style style:name="T93" style:parent-style-name="DefaultParagraphFont" style:family="text">
      <style:text-properties style:font-name="MS Gothic" style:font-name-asian="MS Gothic" style:font-name-complex="MS Gothic"/>
    </style:style>
    <style:style style:name="T94" style:parent-style-name="DefaultParagraphFont" style:family="text">
      <style:text-properties style:font-name="Calibri" style:font-name-complex="Calibri"/>
    </style:style>
    <style:style style:name="T95" style:parent-style-name="DefaultParagraphFont" style:family="text">
      <style:text-properties style:font-name="MS Gothic" style:font-name-asian="MS Gothic" style:font-name-complex="MS Gothic"/>
    </style:style>
    <style:style style:name="T96" style:parent-style-name="DefaultParagraphFont" style:family="text">
      <style:text-properties style:font-name="Calibri" style:font-name-complex="Calibri"/>
    </style:style>
    <style:style style:name="T97" style:parent-style-name="DefaultParagraphFont" style:family="text">
      <style:text-properties style:font-name="MS Gothic" style:font-name-asian="MS Gothic" style:font-name-complex="MS Gothic"/>
    </style:style>
    <style:style style:name="T98" style:parent-style-name="DefaultParagraphFont" style:family="text">
      <style:text-properties style:font-name="Calibri" style:font-name-complex="Calibri"/>
    </style:style>
    <style:style style:name="T99" style:parent-style-name="DefaultParagraphFont" style:family="text">
      <style:text-properties style:font-name="MS Gothic" style:font-name-asian="MS Gothic" style:font-name-complex="MS Gothic"/>
    </style:style>
    <style:style style:name="T100" style:parent-style-name="DefaultParagraphFont" style:family="text">
      <style:text-properties style:font-name="Calibri" style:font-name-complex="Calibri"/>
    </style:style>
    <style:style style:name="T101" style:parent-style-name="DefaultParagraphFont" style:family="text">
      <style:text-properties style:font-name="MS Gothic" style:font-name-asian="MS Gothic" style:font-name-complex="MS Gothic"/>
    </style:style>
    <style:style style:name="T102" style:parent-style-name="DefaultParagraphFont" style:family="text">
      <style:text-properties style:font-name="Calibri" style:font-name-complex="Calibri"/>
    </style:style>
    <style:style style:name="T103" style:parent-style-name="DefaultParagraphFont" style:family="text">
      <style:text-properties style:font-name="MS Gothic" style:font-name-asian="MS Gothic" style:font-name-complex="MS Gothic"/>
    </style:style>
    <style:style style:name="T104" style:parent-style-name="DefaultParagraphFont" style:family="text">
      <style:text-properties style:font-name="Calibri" style:font-name-complex="Calibri"/>
    </style:style>
    <style:style style:name="T105" style:parent-style-name="DefaultParagraphFont" style:family="text">
      <style:text-properties style:font-name="MS Gothic" style:font-name-asian="MS Gothic" style:font-name-complex="MS Gothic"/>
    </style:style>
    <style:style style:name="T106" style:parent-style-name="DefaultParagraphFont" style:family="text">
      <style:text-properties style:font-name="Calibri" style:font-name-complex="Calibri"/>
    </style:style>
    <style:style style:name="T107" style:parent-style-name="DefaultParagraphFont" style:family="text">
      <style:text-properties style:font-name="MS Gothic" style:font-name-asian="MS Gothic" style:font-name-complex="MS Gothic"/>
    </style:style>
    <style:style style:name="T108" style:parent-style-name="DefaultParagraphFont" style:family="text">
      <style:text-properties style:font-name="Calibri" style:font-name-complex="Calibri"/>
    </style:style>
    <style:style style:name="T109" style:parent-style-name="DefaultParagraphFont" style:family="text">
      <style:text-properties style:font-name="MS Gothic" style:font-name-asian="MS Gothic" style:font-name-complex="MS Gothic"/>
    </style:style>
    <style:style style:name="T110" style:parent-style-name="DefaultParagraphFont" style:family="text">
      <style:text-properties style:font-name="Calibri" style:font-name-complex="Calibri"/>
    </style:style>
    <style:style style:name="T111" style:parent-style-name="DefaultParagraphFont" style:family="text">
      <style:text-properties style:font-name="MS Gothic" style:font-name-asian="MS Gothic" style:font-name-complex="MS Gothic"/>
    </style:style>
    <style:style style:name="T112" style:parent-style-name="DefaultParagraphFont" style:family="text">
      <style:text-properties style:font-name="Calibri" style:font-name-complex="Calibri"/>
    </style:style>
    <style:style style:name="T113" style:parent-style-name="DefaultParagraphFont" style:family="text">
      <style:text-properties style:font-name="MS Gothic" style:font-name-asian="MS Gothic" style:font-name-complex="MS Gothic"/>
    </style:style>
    <style:style style:name="T114" style:parent-style-name="DefaultParagraphFont" style:family="text">
      <style:text-properties style:font-name="Calibri" style:font-name-complex="Calibri"/>
    </style:style>
    <style:style style:name="T115" style:parent-style-name="DefaultParagraphFont" style:family="text">
      <style:text-properties style:font-name="MS Gothic" style:font-name-asian="MS Gothic" style:font-name-complex="MS Gothic"/>
    </style:style>
    <style:style style:name="T116" style:parent-style-name="DefaultParagraphFont" style:family="text">
      <style:text-properties style:font-name="Calibri" style:font-name-complex="Calibri"/>
    </style:style>
    <style:style style:name="T117" style:parent-style-name="DefaultParagraphFont" style:family="text">
      <style:text-properties style:font-name="MS Gothic" style:font-name-asian="MS Gothic" style:font-name-complex="MS Gothic"/>
    </style:style>
    <style:style style:name="T118" style:parent-style-name="DefaultParagraphFont" style:family="text">
      <style:text-properties style:font-name="Calibri" style:font-name-complex="Calibri"/>
    </style:style>
    <style:style style:name="T119" style:parent-style-name="DefaultParagraphFont" style:family="text">
      <style:text-properties style:font-name="MS Gothic" style:font-name-asian="MS Gothic" style:font-name-complex="MS Gothic"/>
    </style:style>
    <style:style style:name="T120" style:parent-style-name="DefaultParagraphFont" style:family="text">
      <style:text-properties style:font-name="Calibri" style:font-name-complex="Calibri"/>
    </style:style>
    <style:style style:name="T121" style:parent-style-name="DefaultParagraphFont" style:family="text">
      <style:text-properties style:font-name="MS Gothic" style:font-name-asian="MS Gothic" style:font-name-complex="MS Gothic"/>
    </style:style>
    <style:style style:name="T122" style:parent-style-name="DefaultParagraphFont" style:family="text">
      <style:text-properties style:font-name="Calibri" style:font-name-complex="Calibri"/>
    </style:style>
    <style:style style:name="T123" style:parent-style-name="DefaultParagraphFont" style:family="text">
      <style:text-properties style:font-name="MS Gothic" style:font-name-asian="MS Gothic" style:font-name-complex="MS Gothic"/>
    </style:style>
    <style:style style:name="T124" style:parent-style-name="DefaultParagraphFont" style:family="text">
      <style:text-properties style:font-name="Calibri" style:font-name-complex="Calibri"/>
    </style:style>
    <style:style style:name="T125" style:parent-style-name="DefaultParagraphFont" style:family="text">
      <style:text-properties style:font-name="MS Gothic" style:font-name-asian="MS Gothic" style:font-name-complex="MS Gothic"/>
    </style:style>
    <style:style style:name="T126" style:parent-style-name="DefaultParagraphFont" style:family="text">
      <style:text-properties style:font-name="Calibri" style:font-name-complex="Calibri"/>
    </style:style>
    <style:style style:name="T127" style:parent-style-name="DefaultParagraphFont" style:family="text">
      <style:text-properties style:font-name="MS Gothic" style:font-name-asian="MS Gothic" style:font-name-complex="MS Gothic"/>
    </style:style>
    <style:style style:name="T128" style:parent-style-name="DefaultParagraphFont" style:family="text">
      <style:text-properties style:font-name="Calibri" style:font-name-complex="Calibri"/>
    </style:style>
    <style:style style:name="T129" style:parent-style-name="DefaultParagraphFont" style:family="text">
      <style:text-properties style:font-name="MS Gothic" style:font-name-asian="MS Gothic" style:font-name-complex="MS Gothic"/>
    </style:style>
    <style:style style:name="T130" style:parent-style-name="DefaultParagraphFont" style:family="text">
      <style:text-properties style:font-name="Calibri" style:font-name-complex="Calibri"/>
    </style:style>
    <style:style style:name="T131" style:parent-style-name="DefaultParagraphFont" style:family="text">
      <style:text-properties style:font-name="MS Gothic" style:font-name-asian="MS Gothic" style:font-name-complex="MS Gothic"/>
    </style:style>
    <style:style style:name="T132" style:parent-style-name="DefaultParagraphFont" style:family="text">
      <style:text-properties style:font-name="Calibri" style:font-name-complex="Calibri"/>
    </style:style>
    <style:style style:name="T133" style:parent-style-name="DefaultParagraphFont" style:family="text">
      <style:text-properties style:font-name="MS Gothic" style:font-name-asian="MS Gothic" style:font-name-complex="MS Gothic"/>
    </style:style>
    <style:style style:name="T134" style:parent-style-name="DefaultParagraphFont" style:family="text">
      <style:text-properties style:font-name="Calibri" style:font-name-complex="Calibri"/>
    </style:style>
    <style:style style:name="T135" style:parent-style-name="DefaultParagraphFont" style:family="text">
      <style:text-properties style:font-name="MS Gothic" style:font-name-asian="MS Gothic" style:font-name-complex="MS Gothic"/>
    </style:style>
    <style:style style:name="T136" style:parent-style-name="DefaultParagraphFont" style:family="text">
      <style:text-properties style:font-name="Calibri" style:font-name-complex="Calibri"/>
    </style:style>
    <style:style style:name="T137" style:parent-style-name="DefaultParagraphFont" style:family="text">
      <style:text-properties style:font-name="MS Gothic" style:font-name-asian="MS Gothic" style:font-name-complex="MS Gothic"/>
    </style:style>
    <style:style style:name="T138" style:parent-style-name="DefaultParagraphFont" style:family="text">
      <style:text-properties style:font-name="Calibri" style:font-name-complex="Calibri"/>
    </style:style>
    <style:style style:name="T139" style:parent-style-name="DefaultParagraphFont" style:family="text">
      <style:text-properties style:font-name="MS Gothic" style:font-name-asian="MS Gothic" style:font-name-complex="MS Gothic"/>
    </style:style>
    <style:style style:name="T140" style:parent-style-name="DefaultParagraphFont" style:family="text">
      <style:text-properties style:font-name="Calibri" style:font-name-complex="Calibri"/>
    </style:style>
    <style:style style:name="T141" style:parent-style-name="DefaultParagraphFont" style:family="text">
      <style:text-properties style:font-name="MS Gothic" style:font-name-asian="MS Gothic" style:font-name-complex="MS Gothic"/>
    </style:style>
    <style:style style:name="T142" style:parent-style-name="DefaultParagraphFont" style:family="text">
      <style:text-properties style:font-name="Calibri" style:font-name-complex="Calibri"/>
    </style:style>
    <style:style style:name="T143" style:parent-style-name="DefaultParagraphFont" style:family="text">
      <style:text-properties style:font-name="MS Gothic" style:font-name-asian="MS Gothic" style:font-name-complex="MS Gothic"/>
    </style:style>
    <style:style style:name="T144" style:parent-style-name="DefaultParagraphFont" style:family="text">
      <style:text-properties style:font-name="Calibri" style:font-name-complex="Calibri"/>
    </style:style>
    <style:style style:name="T145" style:parent-style-name="DefaultParagraphFont" style:family="text">
      <style:text-properties style:font-name="MS Gothic" style:font-name-asian="MS Gothic" style:font-name-complex="MS Gothic"/>
    </style:style>
    <style:style style:name="T146" style:parent-style-name="DefaultParagraphFont" style:family="text">
      <style:text-properties style:font-name="Calibri" style:font-name-complex="Calibri"/>
    </style:style>
    <style:style style:name="T147" style:parent-style-name="DefaultParagraphFont" style:family="text">
      <style:text-properties style:font-name="MS Gothic" style:font-name-asian="MS Gothic" style:font-name-complex="MS Gothic"/>
    </style:style>
    <style:style style:name="T148" style:parent-style-name="DefaultParagraphFont" style:family="text">
      <style:text-properties style:font-name="Calibri" style:font-name-complex="Calibri"/>
    </style:style>
    <style:style style:name="T149" style:parent-style-name="DefaultParagraphFont" style:family="text">
      <style:text-properties style:font-name="MS Gothic" style:font-name-asian="MS Gothic" style:font-name-complex="MS Gothic"/>
    </style:style>
    <style:style style:name="T150" style:parent-style-name="DefaultParagraphFont" style:family="text">
      <style:text-properties style:font-name="Calibri" style:font-name-complex="Calibri"/>
    </style:style>
    <style:style style:name="T151" style:parent-style-name="DefaultParagraphFont" style:family="text">
      <style:text-properties style:font-name="MS Gothic" style:font-name-asian="MS Gothic" style:font-name-complex="MS Gothic"/>
    </style:style>
    <style:style style:name="T152" style:parent-style-name="DefaultParagraphFont" style:family="text">
      <style:text-properties style:font-name="Calibri" style:font-name-complex="Calibri"/>
    </style:style>
    <style:style style:name="T153" style:parent-style-name="DefaultParagraphFont" style:family="text">
      <style:text-properties style:font-name="MS Gothic" style:font-name-asian="MS Gothic" style:font-name-complex="MS Gothic"/>
    </style:style>
    <style:style style:name="T154" style:parent-style-name="DefaultParagraphFont" style:family="text">
      <style:text-properties style:font-name="Calibri" style:font-name-complex="Calibri"/>
    </style:style>
    <style:style style:name="T155" style:parent-style-name="DefaultParagraphFont" style:family="text">
      <style:text-properties style:font-name="MS Gothic" style:font-name-asian="MS Gothic" style:font-name-complex="MS Gothic"/>
    </style:style>
    <style:style style:name="T156" style:parent-style-name="DefaultParagraphFont" style:family="text">
      <style:text-properties style:font-name="Calibri" style:font-name-complex="Calibri"/>
    </style:style>
    <style:style style:name="T157" style:parent-style-name="DefaultParagraphFont" style:family="text">
      <style:text-properties style:font-name="MS Gothic" style:font-name-asian="MS Gothic" style:font-name-complex="MS Gothic"/>
    </style:style>
    <style:style style:name="T158" style:parent-style-name="DefaultParagraphFont" style:family="text">
      <style:text-properties style:font-name="Calibri" style:font-name-complex="Calibri"/>
    </style:style>
    <style:style style:name="T159" style:parent-style-name="DefaultParagraphFont" style:family="text">
      <style:text-properties style:font-name="MS Gothic" style:font-name-asian="MS Gothic" style:font-name-complex="MS Gothic"/>
    </style:style>
    <style:style style:name="T160" style:parent-style-name="DefaultParagraphFont" style:family="text">
      <style:text-properties style:font-name="Calibri" style:font-name-complex="Calibri"/>
    </style:style>
    <style:style style:name="T161" style:parent-style-name="DefaultParagraphFont" style:family="text">
      <style:text-properties style:font-name="MS Gothic" style:font-name-asian="MS Gothic" style:font-name-complex="MS Gothic"/>
    </style:style>
    <style:style style:name="T162" style:parent-style-name="DefaultParagraphFont" style:family="text">
      <style:text-properties style:font-name="Calibri" style:font-name-complex="Calibri"/>
    </style:style>
    <style:style style:name="T163" style:parent-style-name="DefaultParagraphFont" style:family="text">
      <style:text-properties style:font-name="MS Gothic" style:font-name-asian="MS Gothic" style:font-name-complex="MS Gothic"/>
    </style:style>
    <style:style style:name="T164" style:parent-style-name="DefaultParagraphFont" style:family="text">
      <style:text-properties style:font-name="Calibri" style:font-name-complex="Calibri"/>
    </style:style>
    <style:style style:name="T165" style:parent-style-name="DefaultParagraphFont" style:family="text">
      <style:text-properties style:font-name="MS Gothic" style:font-name-asian="MS Gothic" style:font-name-complex="MS Gothic"/>
    </style:style>
    <style:style style:name="T166" style:parent-style-name="DefaultParagraphFont" style:family="text">
      <style:text-properties style:font-name="Calibri" style:font-name-complex="Calibri"/>
    </style:style>
    <style:style style:name="T167" style:parent-style-name="DefaultParagraphFont" style:family="text">
      <style:text-properties style:font-name="MS Gothic" style:font-name-asian="MS Gothic" style:font-name-complex="MS Gothic"/>
    </style:style>
    <style:style style:name="T168" style:parent-style-name="DefaultParagraphFont" style:family="text">
      <style:text-properties style:font-name="Calibri" style:font-name-complex="Calibri"/>
    </style:style>
    <style:style style:name="T169" style:parent-style-name="DefaultParagraphFont" style:family="text">
      <style:text-properties style:font-name="MS Gothic" style:font-name-asian="MS Gothic" style:font-name-complex="MS Gothic"/>
    </style:style>
    <style:style style:name="T170" style:parent-style-name="DefaultParagraphFont" style:family="text">
      <style:text-properties style:font-name="Calibri" style:font-name-complex="Calibri"/>
    </style:style>
    <style:style style:name="T171" style:parent-style-name="DefaultParagraphFont" style:family="text">
      <style:text-properties style:font-name="MS Gothic" style:font-name-asian="MS Gothic" style:font-name-complex="MS Gothic"/>
    </style:style>
    <style:style style:name="T172" style:parent-style-name="DefaultParagraphFont" style:family="text">
      <style:text-properties style:font-name="Calibri" style:font-name-complex="Calibri"/>
    </style:style>
    <style:style style:name="T173" style:parent-style-name="DefaultParagraphFont" style:family="text">
      <style:text-properties style:font-name="MS Gothic" style:font-name-asian="MS Gothic" style:font-name-complex="MS Gothic"/>
    </style:style>
    <style:style style:name="T174" style:parent-style-name="DefaultParagraphFont" style:family="text">
      <style:text-properties style:font-name="Calibri" style:font-name-complex="Calibri"/>
    </style:style>
    <style:style style:name="T175" style:parent-style-name="DefaultParagraphFont" style:family="text">
      <style:text-properties style:font-name="MS Gothic" style:font-name-asian="MS Gothic" style:font-name-complex="MS Gothic"/>
    </style:style>
    <style:style style:name="T176" style:parent-style-name="DefaultParagraphFont" style:family="text">
      <style:text-properties style:font-name="Calibri" style:font-name-complex="Calibri"/>
    </style:style>
    <style:style style:name="T177" style:parent-style-name="DefaultParagraphFont" style:family="text">
      <style:text-properties style:font-name="MS Gothic" style:font-name-asian="MS Gothic" style:font-name-complex="MS Gothic"/>
    </style:style>
    <style:style style:name="T178" style:parent-style-name="DefaultParagraphFont" style:family="text">
      <style:text-properties style:font-name="Calibri" style:font-name-complex="Calibri"/>
    </style:style>
    <style:style style:name="T179" style:parent-style-name="DefaultParagraphFont" style:family="text">
      <style:text-properties style:font-name="MS Gothic" style:font-name-asian="MS Gothic" style:font-name-complex="MS Gothic"/>
    </style:style>
    <style:style style:name="T180" style:parent-style-name="DefaultParagraphFont" style:family="text">
      <style:text-properties style:font-name="Calibri" style:font-name-complex="Calibri"/>
    </style:style>
    <style:style style:name="T181" style:parent-style-name="DefaultParagraphFont" style:family="text">
      <style:text-properties style:font-name="MS Gothic" style:font-name-asian="MS Gothic" style:font-name-complex="MS Gothic"/>
    </style:style>
    <style:style style:name="T182" style:parent-style-name="DefaultParagraphFont" style:family="text">
      <style:text-properties style:font-name="Calibri" style:font-name-complex="Calibri"/>
    </style:style>
    <style:style style:name="T183" style:parent-style-name="DefaultParagraphFont" style:family="text">
      <style:text-properties style:font-name="MS Gothic" style:font-name-asian="MS Gothic" style:font-name-complex="MS Gothic"/>
    </style:style>
    <style:style style:name="T184" style:parent-style-name="DefaultParagraphFont" style:family="text">
      <style:text-properties style:font-name="Calibri" style:font-name-complex="Calibri"/>
    </style:style>
    <style:style style:name="T185" style:parent-style-name="DefaultParagraphFont" style:family="text">
      <style:text-properties style:font-name="MS Gothic" style:font-name-asian="MS Gothic" style:font-name-complex="MS Gothic"/>
    </style:style>
    <style:style style:name="T186" style:parent-style-name="DefaultParagraphFont" style:family="text">
      <style:text-properties style:font-name="Calibri" style:font-name-complex="Calibri"/>
    </style:style>
    <style:style style:name="T187" style:parent-style-name="DefaultParagraphFont" style:family="text">
      <style:text-properties style:font-name="MS Gothic" style:font-name-asian="MS Gothic" style:font-name-complex="MS Gothic"/>
    </style:style>
    <style:style style:name="T188" style:parent-style-name="DefaultParagraphFont" style:family="text">
      <style:text-properties style:font-name="Calibri" style:font-name-complex="Calibri"/>
    </style:style>
    <style:style style:name="T189" style:parent-style-name="DefaultParagraphFont" style:family="text">
      <style:text-properties style:font-name="MS Gothic" style:font-name-asian="MS Gothic" style:font-name-complex="MS Gothic"/>
    </style:style>
    <style:style style:name="T190" style:parent-style-name="DefaultParagraphFont" style:family="text">
      <style:text-properties style:font-name="Calibri" style:font-name-complex="Calibri"/>
    </style:style>
    <style:style style:name="T191" style:parent-style-name="DefaultParagraphFont" style:family="text">
      <style:text-properties style:font-name="MS Gothic" style:font-name-asian="MS Gothic" style:font-name-complex="MS Gothic"/>
    </style:style>
    <style:style style:name="T192" style:parent-style-name="DefaultParagraphFont" style:family="text">
      <style:text-properties style:font-name="Calibri" style:font-name-complex="Calibri"/>
    </style:style>
    <style:style style:name="T193" style:parent-style-name="DefaultParagraphFont" style:family="text">
      <style:text-properties style:font-name="MS Gothic" style:font-name-asian="MS Gothic" style:font-name-complex="MS Gothic"/>
    </style:style>
    <style:style style:name="T194" style:parent-style-name="DefaultParagraphFont" style:family="text">
      <style:text-properties style:font-name="Calibri" style:font-name-complex="Calibri"/>
    </style:style>
    <style:style style:name="T195" style:parent-style-name="DefaultParagraphFont" style:family="text">
      <style:text-properties style:font-name="MS Gothic" style:font-name-asian="MS Gothic" style:font-name-complex="MS Gothic"/>
    </style:style>
    <style:style style:name="T196" style:parent-style-name="DefaultParagraphFont" style:family="text">
      <style:text-properties style:font-name="Calibri" style:font-name-complex="Calibri"/>
    </style:style>
    <style:style style:name="T197" style:parent-style-name="DefaultParagraphFont" style:family="text">
      <style:text-properties style:font-name="MS Gothic" style:font-name-asian="MS Gothic" style:font-name-complex="MS Gothic"/>
    </style:style>
    <style:style style:name="T198" style:parent-style-name="DefaultParagraphFont" style:family="text">
      <style:text-properties style:font-name="Calibri" style:font-name-complex="Calibri"/>
    </style:style>
    <style:style style:name="T199" style:parent-style-name="DefaultParagraphFont" style:family="text">
      <style:text-properties style:font-name="MS Gothic" style:font-name-asian="MS Gothic" style:font-name-complex="MS Gothic"/>
    </style:style>
    <style:style style:name="T200" style:parent-style-name="DefaultParagraphFont" style:family="text">
      <style:text-properties style:font-name="Calibri" style:font-name-complex="Calibri"/>
    </style:style>
    <style:style style:name="T201" style:parent-style-name="DefaultParagraphFont" style:family="text">
      <style:text-properties style:font-name="MS Gothic" style:font-name-asian="MS Gothic" style:font-name-complex="MS Gothic"/>
    </style:style>
    <style:style style:name="T202" style:parent-style-name="DefaultParagraphFont" style:family="text">
      <style:text-properties style:font-name="Calibri" style:font-name-complex="Calibri"/>
    </style:style>
    <style:style style:name="T203" style:parent-style-name="DefaultParagraphFont" style:family="text">
      <style:text-properties style:font-name="MS Gothic" style:font-name-asian="MS Gothic" style:font-name-complex="MS Gothic"/>
    </style:style>
    <style:style style:name="T204" style:parent-style-name="DefaultParagraphFont" style:family="text">
      <style:text-properties style:font-name="Calibri" style:font-name-complex="Calibri"/>
    </style:style>
    <style:style style:name="T205" style:parent-style-name="DefaultParagraphFont" style:family="text">
      <style:text-properties style:font-name="MS Gothic" style:font-name-asian="MS Gothic" style:font-name-complex="MS Gothic"/>
    </style:style>
    <style:style style:name="T206" style:parent-style-name="DefaultParagraphFont" style:family="text">
      <style:text-properties style:font-name="Calibri" style:font-name-complex="Calibri"/>
    </style:style>
    <style:style style:name="T207" style:parent-style-name="DefaultParagraphFont" style:family="text">
      <style:text-properties style:font-name="MS Gothic" style:font-name-asian="MS Gothic" style:font-name-complex="MS Gothic"/>
    </style:style>
    <style:style style:name="T208" style:parent-style-name="DefaultParagraphFont" style:family="text">
      <style:text-properties style:font-name="Calibri" style:font-name-complex="Calibri"/>
    </style:style>
    <style:style style:name="T209" style:parent-style-name="DefaultParagraphFont" style:family="text">
      <style:text-properties style:font-name="MS Gothic" style:font-name-asian="MS Gothic" style:font-name-complex="MS Gothic"/>
    </style:style>
    <style:style style:name="T210" style:parent-style-name="DefaultParagraphFont" style:family="text">
      <style:text-properties style:font-name="Calibri" style:font-name-complex="Calibri"/>
    </style:style>
    <style:style style:name="T211" style:parent-style-name="DefaultParagraphFont" style:family="text">
      <style:text-properties style:font-name="MS Gothic" style:font-name-asian="MS Gothic" style:font-name-complex="MS Gothic"/>
    </style:style>
    <style:style style:name="T212" style:parent-style-name="DefaultParagraphFont" style:family="text">
      <style:text-properties style:font-name="Calibri" style:font-name-complex="Calibri"/>
    </style:style>
    <style:style style:name="T213" style:parent-style-name="DefaultParagraphFont" style:family="text">
      <style:text-properties style:font-name="MS Gothic" style:font-name-asian="MS Gothic" style:font-name-complex="MS Gothic"/>
    </style:style>
    <style:style style:name="T214" style:parent-style-name="DefaultParagraphFont" style:family="text">
      <style:text-properties style:font-name="Calibri" style:font-name-complex="Calibri"/>
    </style:style>
    <style:style style:name="T215" style:parent-style-name="DefaultParagraphFont" style:family="text">
      <style:text-properties style:font-name="MS Gothic" style:font-name-asian="MS Gothic" style:font-name-complex="MS Gothic"/>
    </style:style>
    <style:style style:name="T216" style:parent-style-name="DefaultParagraphFont" style:family="text">
      <style:text-properties style:font-name="Calibri" style:font-name-complex="Calibri"/>
    </style:style>
    <style:style style:name="T217" style:parent-style-name="DefaultParagraphFont" style:family="text">
      <style:text-properties style:font-name="MS Gothic" style:font-name-asian="MS Gothic" style:font-name-complex="MS Gothic"/>
    </style:style>
    <style:style style:name="T218" style:parent-style-name="DefaultParagraphFont" style:family="text">
      <style:text-properties style:font-name="Calibri" style:font-name-complex="Calibri"/>
    </style:style>
    <style:style style:name="T219" style:parent-style-name="DefaultParagraphFont" style:family="text">
      <style:text-properties style:font-name="MS Gothic" style:font-name-asian="MS Gothic" style:font-name-complex="MS Gothic"/>
    </style:style>
    <style:style style:name="T220" style:parent-style-name="DefaultParagraphFont" style:family="text">
      <style:text-properties style:font-name="Calibri" style:font-name-complex="Calibri"/>
    </style:style>
    <style:style style:name="T221" style:parent-style-name="DefaultParagraphFont" style:family="text">
      <style:text-properties style:font-name="MS Gothic" style:font-name-asian="MS Gothic" style:font-name-complex="MS Gothic"/>
    </style:style>
    <style:style style:name="T222" style:parent-style-name="DefaultParagraphFont" style:family="text">
      <style:text-properties style:font-name="Calibri" style:font-name-complex="Calibri"/>
    </style:style>
    <style:style style:name="T223" style:parent-style-name="DefaultParagraphFont" style:family="text">
      <style:text-properties style:font-name="MS Gothic" style:font-name-asian="MS Gothic" style:font-name-complex="MS Gothic"/>
    </style:style>
    <style:style style:name="T224" style:parent-style-name="DefaultParagraphFont" style:family="text">
      <style:text-properties style:font-name="Calibri" style:font-name-complex="Calibri"/>
    </style:style>
    <style:style style:name="T225" style:parent-style-name="DefaultParagraphFont" style:family="text">
      <style:text-properties style:font-name="MS Gothic" style:font-name-asian="MS Gothic" style:font-name-complex="MS Gothic"/>
    </style:style>
    <style:style style:name="T226" style:parent-style-name="DefaultParagraphFont" style:family="text">
      <style:text-properties style:font-name="Calibri" style:font-name-complex="Calibri"/>
    </style:style>
    <style:style style:name="T227" style:parent-style-name="DefaultParagraphFont" style:family="text">
      <style:text-properties style:font-name="MS Gothic" style:font-name-asian="MS Gothic" style:font-name-complex="MS Gothic"/>
    </style:style>
    <style:style style:name="T228" style:parent-style-name="DefaultParagraphFont" style:family="text">
      <style:text-properties style:font-name="Calibri" style:font-name-complex="Calibri"/>
    </style:style>
    <style:style style:name="T229" style:parent-style-name="DefaultParagraphFont" style:family="text">
      <style:text-properties style:font-name="MS Gothic" style:font-name-asian="MS Gothic" style:font-name-complex="MS Gothic"/>
    </style:style>
    <style:style style:name="T230" style:parent-style-name="DefaultParagraphFont" style:family="text">
      <style:text-properties style:font-name="Calibri" style:font-name-complex="Calibri"/>
    </style:style>
    <style:style style:name="T231" style:parent-style-name="DefaultParagraphFont" style:family="text">
      <style:text-properties style:font-name="MS Gothic" style:font-name-asian="MS Gothic" style:font-name-complex="MS Gothic"/>
    </style:style>
    <style:style style:name="T232" style:parent-style-name="DefaultParagraphFont" style:family="text">
      <style:text-properties style:font-name="Calibri" style:font-name-complex="Calibri"/>
    </style:style>
    <style:style style:name="T233" style:parent-style-name="DefaultParagraphFont" style:family="text">
      <style:text-properties style:font-name="MS Gothic" style:font-name-asian="MS Gothic" style:font-name-complex="MS Gothic"/>
    </style:style>
    <style:style style:name="T234" style:parent-style-name="DefaultParagraphFont" style:family="text">
      <style:text-properties style:font-name="Calibri" style:font-name-complex="Calibri"/>
    </style:style>
    <style:style style:name="T235" style:parent-style-name="DefaultParagraphFont" style:family="text">
      <style:text-properties style:font-name="MS Gothic" style:font-name-asian="MS Gothic" style:font-name-complex="MS Gothic"/>
    </style:style>
    <style:style style:name="T236" style:parent-style-name="DefaultParagraphFont" style:family="text">
      <style:text-properties style:font-name="Calibri" style:font-name-complex="Calibri"/>
    </style:style>
    <style:style style:name="T237" style:parent-style-name="DefaultParagraphFont" style:family="text">
      <style:text-properties style:font-name="MS Gothic" style:font-name-asian="MS Gothic" style:font-name-complex="MS Gothic"/>
    </style:style>
    <style:style style:name="T238" style:parent-style-name="DefaultParagraphFont" style:family="text">
      <style:text-properties style:font-name="Calibri" style:font-name-complex="Calibri"/>
    </style:style>
    <style:style style:name="T239" style:parent-style-name="DefaultParagraphFont" style:family="text">
      <style:text-properties style:font-name="MS Gothic" style:font-name-asian="MS Gothic" style:font-name-complex="MS Gothic"/>
    </style:style>
    <style:style style:name="T240" style:parent-style-name="DefaultParagraphFont" style:family="text">
      <style:text-properties style:font-name="Calibri" style:font-name-complex="Calibri"/>
    </style:style>
    <style:style style:name="T241" style:parent-style-name="DefaultParagraphFont" style:family="text">
      <style:text-properties style:font-name="MS Gothic" style:font-name-asian="MS Gothic" style:font-name-complex="MS Gothic"/>
    </style:style>
    <style:style style:name="T242" style:parent-style-name="DefaultParagraphFont" style:family="text">
      <style:text-properties style:font-name="Calibri" style:font-name-complex="Calibri"/>
    </style:style>
    <style:style style:name="T243" style:parent-style-name="DefaultParagraphFont" style:family="text">
      <style:text-properties style:font-name="MS Gothic" style:font-name-asian="MS Gothic" style:font-name-complex="MS Gothic"/>
    </style:style>
    <style:style style:name="T244" style:parent-style-name="DefaultParagraphFont" style:family="text">
      <style:text-properties style:font-name="Calibri" style:font-name-complex="Calibri"/>
    </style:style>
    <style:style style:name="T245" style:parent-style-name="DefaultParagraphFont" style:family="text">
      <style:text-properties style:font-name="MS Gothic" style:font-name-asian="MS Gothic" style:font-name-complex="MS Gothic"/>
    </style:style>
    <style:style style:name="T246" style:parent-style-name="DefaultParagraphFont" style:family="text">
      <style:text-properties style:font-name="Calibri" style:font-name-complex="Calibri"/>
    </style:style>
    <style:style style:name="T247" style:parent-style-name="DefaultParagraphFont" style:family="text">
      <style:text-properties style:font-name="MS Gothic" style:font-name-asian="MS Gothic" style:font-name-complex="MS Gothic"/>
    </style:style>
    <style:style style:name="T248" style:parent-style-name="DefaultParagraphFont" style:family="text">
      <style:text-properties style:font-name="Calibri" style:font-name-complex="Calibri"/>
    </style:style>
    <style:style style:name="T249" style:parent-style-name="DefaultParagraphFont" style:family="text">
      <style:text-properties style:font-name="MS Gothic" style:font-name-asian="MS Gothic" style:font-name-complex="MS Gothic"/>
    </style:style>
    <style:style style:name="T250" style:parent-style-name="DefaultParagraphFont" style:family="text">
      <style:text-properties style:font-name="Calibri" style:font-name-complex="Calibri"/>
    </style:style>
    <style:style style:name="T251" style:parent-style-name="DefaultParagraphFont" style:family="text">
      <style:text-properties style:font-name="MS Gothic" style:font-name-asian="MS Gothic" style:font-name-complex="MS Gothic"/>
    </style:style>
    <style:style style:name="T252" style:parent-style-name="DefaultParagraphFont" style:family="text">
      <style:text-properties style:font-name="Calibri" style:font-name-complex="Calibri"/>
    </style:style>
    <style:style style:name="T253" style:parent-style-name="DefaultParagraphFont" style:family="text">
      <style:text-properties style:font-name="MS Gothic" style:font-name-asian="MS Gothic" style:font-name-complex="MS Gothic"/>
    </style:style>
    <style:style style:name="T254" style:parent-style-name="DefaultParagraphFont" style:family="text">
      <style:text-properties style:font-name="Calibri" style:font-name-complex="Calibri"/>
    </style:style>
    <style:style style:name="T255" style:parent-style-name="DefaultParagraphFont" style:family="text">
      <style:text-properties style:font-name="MS Gothic" style:font-name-asian="MS Gothic" style:font-name-complex="MS Gothic"/>
    </style:style>
    <style:style style:name="T256" style:parent-style-name="DefaultParagraphFont" style:family="text">
      <style:text-properties style:font-name="Calibri" style:font-name-complex="Calibri"/>
    </style:style>
    <style:style style:name="T257" style:parent-style-name="DefaultParagraphFont" style:family="text">
      <style:text-properties style:font-name="MS Gothic" style:font-name-asian="MS Gothic" style:font-name-complex="MS Gothic"/>
    </style:style>
    <style:style style:name="T258" style:parent-style-name="DefaultParagraphFont" style:family="text">
      <style:text-properties style:font-name="Calibri" style:font-name-complex="Calibri"/>
    </style:style>
    <style:style style:name="T259" style:parent-style-name="DefaultParagraphFont" style:family="text">
      <style:text-properties style:font-name="MS Gothic" style:font-name-asian="MS Gothic" style:font-name-complex="MS Gothic"/>
    </style:style>
    <style:style style:name="T260" style:parent-style-name="DefaultParagraphFont" style:family="text">
      <style:text-properties style:font-name="Calibri" style:font-name-complex="Calibri"/>
    </style:style>
    <style:style style:name="T261" style:parent-style-name="DefaultParagraphFont" style:family="text">
      <style:text-properties style:font-name="MS Gothic" style:font-name-asian="MS Gothic" style:font-name-complex="MS Gothic"/>
    </style:style>
    <style:style style:name="T262" style:parent-style-name="DefaultParagraphFont" style:family="text">
      <style:text-properties style:font-name="Calibri" style:font-name-complex="Calibri"/>
    </style:style>
    <style:style style:name="T263" style:parent-style-name="DefaultParagraphFont" style:family="text">
      <style:text-properties style:font-name="MS Gothic" style:font-name-asian="MS Gothic" style:font-name-complex="MS Gothic"/>
    </style:style>
    <style:style style:name="T264" style:parent-style-name="DefaultParagraphFont" style:family="text">
      <style:text-properties style:font-name="Calibri" style:font-name-complex="Calibri"/>
    </style:style>
    <style:style style:name="T265" style:parent-style-name="DefaultParagraphFont" style:family="text">
      <style:text-properties style:font-name="MS Gothic" style:font-name-asian="MS Gothic" style:font-name-complex="MS Gothic"/>
    </style:style>
    <style:style style:name="T266" style:parent-style-name="DefaultParagraphFont" style:family="text">
      <style:text-properties style:font-name="Calibri" style:font-name-complex="Calibri"/>
    </style:style>
    <style:style style:name="T267" style:parent-style-name="DefaultParagraphFont" style:family="text">
      <style:text-properties style:font-name="MS Gothic" style:font-name-asian="MS Gothic" style:font-name-complex="MS Gothic"/>
    </style:style>
    <style:style style:name="T268" style:parent-style-name="DefaultParagraphFont" style:family="text">
      <style:text-properties style:font-name="Calibri" style:font-name-complex="Calibri"/>
    </style:style>
    <style:style style:name="T269" style:parent-style-name="DefaultParagraphFont" style:family="text">
      <style:text-properties style:font-name="MS Gothic" style:font-name-asian="MS Gothic" style:font-name-complex="MS Gothic"/>
    </style:style>
    <style:style style:name="T270" style:parent-style-name="DefaultParagraphFont" style:family="text">
      <style:text-properties style:font-name="Calibri" style:font-name-complex="Calibri"/>
    </style:style>
    <style:style style:name="T271" style:parent-style-name="DefaultParagraphFont" style:family="text">
      <style:text-properties style:font-name="MS Gothic" style:font-name-asian="MS Gothic" style:font-name-complex="MS Gothic"/>
    </style:style>
    <style:style style:name="T272" style:parent-style-name="DefaultParagraphFont" style:family="text">
      <style:text-properties style:font-name="Calibri" style:font-name-complex="Calibri"/>
    </style:style>
    <style:style style:name="T273" style:parent-style-name="DefaultParagraphFont" style:family="text">
      <style:text-properties style:font-name="MS Gothic" style:font-name-asian="MS Gothic" style:font-name-complex="MS Gothic"/>
    </style:style>
    <style:style style:name="T274" style:parent-style-name="DefaultParagraphFont" style:family="text">
      <style:text-properties style:font-name="Calibri" style:font-name-complex="Calibri"/>
    </style:style>
    <style:style style:name="T275" style:parent-style-name="DefaultParagraphFont" style:family="text">
      <style:text-properties style:font-name="MS Gothic" style:font-name-asian="MS Gothic" style:font-name-complex="MS Gothic"/>
    </style:style>
    <style:style style:name="T276" style:parent-style-name="DefaultParagraphFont" style:family="text">
      <style:text-properties style:font-name="Calibri" style:font-name-complex="Calibri"/>
    </style:style>
    <style:style style:name="T277" style:parent-style-name="DefaultParagraphFont" style:family="text">
      <style:text-properties style:font-name="MS Gothic" style:font-name-asian="MS Gothic" style:font-name-complex="MS Gothic"/>
    </style:style>
    <style:style style:name="T278" style:parent-style-name="DefaultParagraphFont" style:family="text">
      <style:text-properties style:font-name="Calibri" style:font-name-complex="Calibri"/>
    </style:style>
    <style:style style:name="T279" style:parent-style-name="DefaultParagraphFont" style:family="text">
      <style:text-properties style:font-name="MS Gothic" style:font-name-asian="MS Gothic" style:font-name-complex="MS Gothic"/>
    </style:style>
    <style:style style:name="T280" style:parent-style-name="DefaultParagraphFont" style:family="text">
      <style:text-properties style:font-name="Calibri" style:font-name-complex="Calibri"/>
    </style:style>
    <style:style style:name="T281" style:parent-style-name="DefaultParagraphFont" style:family="text">
      <style:text-properties style:font-name="MS Gothic" style:font-name-asian="MS Gothic" style:font-name-complex="MS Gothic"/>
    </style:style>
    <style:style style:name="T282" style:parent-style-name="DefaultParagraphFont" style:family="text">
      <style:text-properties style:font-name="Calibri" style:font-name-complex="Calibri"/>
    </style:style>
    <style:style style:name="T283" style:parent-style-name="DefaultParagraphFont" style:family="text">
      <style:text-properties style:font-name="MS Gothic" style:font-name-asian="MS Gothic" style:font-name-complex="MS Gothic"/>
    </style:style>
    <style:style style:name="T284" style:parent-style-name="DefaultParagraphFont" style:family="text">
      <style:text-properties style:font-name="Calibri" style:font-name-complex="Calibri"/>
    </style:style>
    <style:style style:name="T285" style:parent-style-name="DefaultParagraphFont" style:family="text">
      <style:text-properties style:font-name="MS Gothic" style:font-name-asian="MS Gothic" style:font-name-complex="MS Gothic"/>
    </style:style>
    <style:style style:name="T286" style:parent-style-name="DefaultParagraphFont" style:family="text">
      <style:text-properties style:font-name="Calibri" style:font-name-complex="Calibri"/>
    </style:style>
    <style:style style:name="T287" style:parent-style-name="DefaultParagraphFont" style:family="text">
      <style:text-properties style:font-name="MS Gothic" style:font-name-asian="MS Gothic" style:font-name-complex="MS Gothic"/>
    </style:style>
    <style:style style:name="T288" style:parent-style-name="DefaultParagraphFont" style:family="text">
      <style:text-properties style:font-name="Calibri" style:font-name-complex="Calibri"/>
    </style:style>
    <style:style style:name="T289" style:parent-style-name="DefaultParagraphFont" style:family="text">
      <style:text-properties style:font-name="MS Gothic" style:font-name-asian="MS Gothic" style:font-name-complex="MS Gothic"/>
    </style:style>
    <style:style style:name="T290" style:parent-style-name="DefaultParagraphFont" style:family="text">
      <style:text-properties style:font-name="Calibri" style:font-name-complex="Calibri"/>
    </style:style>
    <style:style style:name="T291" style:parent-style-name="DefaultParagraphFont" style:family="text">
      <style:text-properties style:font-name="MS Gothic" style:font-name-asian="MS Gothic" style:font-name-complex="MS Gothic"/>
    </style:style>
    <style:style style:name="T292" style:parent-style-name="DefaultParagraphFont" style:family="text">
      <style:text-properties style:font-name="Calibri" style:font-name-complex="Calibri"/>
    </style:style>
    <style:style style:name="T293" style:parent-style-name="DefaultParagraphFont" style:family="text">
      <style:text-properties style:font-name="MS Gothic" style:font-name-asian="MS Gothic" style:font-name-complex="MS Gothic"/>
    </style:style>
    <style:style style:name="T294" style:parent-style-name="DefaultParagraphFont" style:family="text">
      <style:text-properties style:font-name="Calibri" style:font-name-complex="Calibri"/>
    </style:style>
    <style:style style:name="T295" style:parent-style-name="DefaultParagraphFont" style:family="text">
      <style:text-properties style:font-name="MS Gothic" style:font-name-asian="MS Gothic" style:font-name-complex="MS Gothic"/>
    </style:style>
    <style:style style:name="T296" style:parent-style-name="DefaultParagraphFont" style:family="text">
      <style:text-properties style:font-name="Calibri" style:font-name-complex="Calibri"/>
    </style:style>
    <style:style style:name="T297" style:parent-style-name="DefaultParagraphFont" style:family="text">
      <style:text-properties style:font-name="MS Gothic" style:font-name-asian="MS Gothic" style:font-name-complex="MS Gothic"/>
    </style:style>
    <style:style style:name="T298" style:parent-style-name="DefaultParagraphFont" style:family="text">
      <style:text-properties style:font-name="Calibri" style:font-name-complex="Calibri"/>
    </style:style>
    <style:style style:name="T299" style:parent-style-name="DefaultParagraphFont" style:family="text">
      <style:text-properties style:font-name="MS Gothic" style:font-name-asian="MS Gothic" style:font-name-complex="MS Gothic"/>
    </style:style>
    <style:style style:name="T300" style:parent-style-name="DefaultParagraphFont" style:family="text">
      <style:text-properties style:font-name="Calibri" style:font-name-complex="Calibri"/>
    </style:style>
    <style:style style:name="T301" style:parent-style-name="DefaultParagraphFont" style:family="text">
      <style:text-properties style:font-name="MS Gothic" style:font-name-asian="MS Gothic" style:font-name-complex="MS Gothic"/>
    </style:style>
    <style:style style:name="T302" style:parent-style-name="DefaultParagraphFont" style:family="text">
      <style:text-properties style:font-name="Calibri" style:font-name-complex="Calibri"/>
    </style:style>
    <style:style style:name="T303" style:parent-style-name="DefaultParagraphFont" style:family="text">
      <style:text-properties style:font-name="MS Gothic" style:font-name-asian="MS Gothic" style:font-name-complex="MS Gothic"/>
    </style:style>
    <style:style style:name="T304" style:parent-style-name="DefaultParagraphFont" style:family="text">
      <style:text-properties style:font-name="Calibri" style:font-name-complex="Calibri"/>
    </style:style>
    <style:style style:name="T305" style:parent-style-name="DefaultParagraphFont" style:family="text">
      <style:text-properties style:font-name="MS Gothic" style:font-name-asian="MS Gothic" style:font-name-complex="MS Gothic"/>
    </style:style>
    <style:style style:name="T306" style:parent-style-name="DefaultParagraphFont" style:family="text">
      <style:text-properties style:font-name="Calibri" style:font-name-complex="Calibri"/>
    </style:style>
    <style:style style:name="T307" style:parent-style-name="DefaultParagraphFont" style:family="text">
      <style:text-properties style:font-name="MS Gothic" style:font-name-asian="MS Gothic" style:font-name-complex="MS Gothic"/>
    </style:style>
    <style:style style:name="T308" style:parent-style-name="DefaultParagraphFont" style:family="text">
      <style:text-properties style:font-name="Calibri" style:font-name-complex="Calibri"/>
    </style:style>
    <style:style style:name="T309" style:parent-style-name="DefaultParagraphFont" style:family="text">
      <style:text-properties style:font-name="MS Gothic" style:font-name-asian="MS Gothic" style:font-name-complex="MS Gothic"/>
    </style:style>
    <style:style style:name="T310" style:parent-style-name="DefaultParagraphFont" style:family="text">
      <style:text-properties style:font-name="Calibri" style:font-name-complex="Calibri"/>
    </style:style>
    <style:style style:name="T311" style:parent-style-name="DefaultParagraphFont" style:family="text">
      <style:text-properties style:font-name="MS Gothic" style:font-name-asian="MS Gothic" style:font-name-complex="MS Gothic"/>
    </style:style>
    <style:style style:name="T312" style:parent-style-name="DefaultParagraphFont" style:family="text">
      <style:text-properties style:font-name="Calibri" style:font-name-complex="Calibri"/>
    </style:style>
    <style:style style:name="T313" style:parent-style-name="DefaultParagraphFont" style:family="text">
      <style:text-properties style:font-name="MS Gothic" style:font-name-asian="MS Gothic" style:font-name-complex="MS Gothic"/>
    </style:style>
    <style:style style:name="T314" style:parent-style-name="DefaultParagraphFont" style:family="text">
      <style:text-properties style:font-name="Calibri" style:font-name-complex="Calibri"/>
    </style:style>
    <style:style style:name="T315" style:parent-style-name="DefaultParagraphFont" style:family="text">
      <style:text-properties style:font-name="MS Gothic" style:font-name-asian="MS Gothic" style:font-name-complex="MS Gothic"/>
    </style:style>
    <style:style style:name="T316" style:parent-style-name="DefaultParagraphFont" style:family="text">
      <style:text-properties style:font-name="Calibri" style:font-name-complex="Calibri"/>
    </style:style>
    <style:style style:name="T317" style:parent-style-name="DefaultParagraphFont" style:family="text">
      <style:text-properties style:font-name="MS Gothic" style:font-name-asian="MS Gothic" style:font-name-complex="MS Gothic"/>
    </style:style>
    <style:style style:name="T318" style:parent-style-name="DefaultParagraphFont" style:family="text">
      <style:text-properties style:font-name="Calibri" style:font-name-complex="Calibri"/>
    </style:style>
    <style:style style:name="T319" style:parent-style-name="DefaultParagraphFont" style:family="text">
      <style:text-properties style:font-name="MS Gothic" style:font-name-asian="MS Gothic" style:font-name-complex="MS Gothic"/>
    </style:style>
    <style:style style:name="T320" style:parent-style-name="DefaultParagraphFont" style:family="text">
      <style:text-properties style:font-name="Calibri" style:font-name-complex="Calibri"/>
    </style:style>
    <style:style style:name="T321" style:parent-style-name="DefaultParagraphFont" style:family="text">
      <style:text-properties style:font-name="MS Gothic" style:font-name-asian="MS Gothic" style:font-name-complex="MS Gothic"/>
    </style:style>
    <style:style style:name="T322" style:parent-style-name="DefaultParagraphFont" style:family="text">
      <style:text-properties style:font-name="Calibri" style:font-name-complex="Calibri"/>
    </style:style>
    <style:style style:name="T323" style:parent-style-name="DefaultParagraphFont" style:family="text">
      <style:text-properties style:font-name="MS Gothic" style:font-name-asian="MS Gothic" style:font-name-complex="MS Gothic"/>
    </style:style>
    <style:style style:name="T324" style:parent-style-name="DefaultParagraphFont" style:family="text">
      <style:text-properties style:font-name="Calibri" style:font-name-complex="Calibri"/>
    </style:style>
    <style:style style:name="T325" style:parent-style-name="DefaultParagraphFont" style:family="text">
      <style:text-properties style:font-name="MS Gothic" style:font-name-asian="MS Gothic" style:font-name-complex="MS Gothic"/>
    </style:style>
    <style:style style:name="T326" style:parent-style-name="DefaultParagraphFont" style:family="text">
      <style:text-properties style:font-name="Calibri" style:font-name-complex="Calibri"/>
    </style:style>
    <style:style style:name="T327" style:parent-style-name="DefaultParagraphFont" style:family="text">
      <style:text-properties style:font-name="MS Gothic" style:font-name-asian="MS Gothic" style:font-name-complex="MS Gothic"/>
    </style:style>
    <style:style style:name="T328" style:parent-style-name="DefaultParagraphFont" style:family="text">
      <style:text-properties style:font-name="Calibri" style:font-name-complex="Calibri"/>
    </style:style>
    <style:style style:name="T329" style:parent-style-name="DefaultParagraphFont" style:family="text">
      <style:text-properties style:font-name="MS Gothic" style:font-name-asian="MS Gothic" style:font-name-complex="MS Gothic"/>
    </style:style>
    <style:style style:name="T330" style:parent-style-name="DefaultParagraphFont" style:family="text">
      <style:text-properties style:font-name="Calibri" style:font-name-complex="Calibri"/>
    </style:style>
    <style:style style:name="T331" style:parent-style-name="DefaultParagraphFont" style:family="text">
      <style:text-properties style:font-name="MS Gothic" style:font-name-asian="MS Gothic" style:font-name-complex="MS Gothic"/>
    </style:style>
    <style:style style:name="T332" style:parent-style-name="DefaultParagraphFont" style:family="text">
      <style:text-properties style:font-name="Calibri" style:font-name-complex="Calibri"/>
    </style:style>
    <style:style style:name="T333" style:parent-style-name="DefaultParagraphFont" style:family="text">
      <style:text-properties style:font-name="MS Gothic" style:font-name-asian="MS Gothic" style:font-name-complex="MS Gothic"/>
    </style:style>
    <style:style style:name="T334" style:parent-style-name="DefaultParagraphFont" style:family="text">
      <style:text-properties style:font-name="Calibri" style:font-name-complex="Calibri"/>
    </style:style>
    <style:style style:name="T335" style:parent-style-name="DefaultParagraphFont" style:family="text">
      <style:text-properties style:font-name="MS Gothic" style:font-name-asian="MS Gothic" style:font-name-complex="MS Gothic"/>
    </style:style>
    <style:style style:name="T336" style:parent-style-name="DefaultParagraphFont" style:family="text">
      <style:text-properties style:font-name="Calibri" style:font-name-complex="Calibri"/>
    </style:style>
    <style:style style:name="T337" style:parent-style-name="DefaultParagraphFont" style:family="text">
      <style:text-properties style:font-name="MS Gothic" style:font-name-asian="MS Gothic" style:font-name-complex="MS Gothic"/>
    </style:style>
    <style:style style:name="T338" style:parent-style-name="DefaultParagraphFont" style:family="text">
      <style:text-properties style:font-name="Calibri" style:font-name-complex="Calibri"/>
    </style:style>
    <style:style style:name="T339" style:parent-style-name="DefaultParagraphFont" style:family="text">
      <style:text-properties style:font-name="MS Gothic" style:font-name-asian="MS Gothic" style:font-name-complex="MS Gothic"/>
    </style:style>
    <style:style style:name="T340" style:parent-style-name="DefaultParagraphFont" style:family="text">
      <style:text-properties style:font-name="Calibri" style:font-name-complex="Calibri"/>
    </style:style>
    <style:style style:name="T341" style:parent-style-name="DefaultParagraphFont" style:family="text">
      <style:text-properties style:font-name="MS Gothic" style:font-name-asian="MS Gothic" style:font-name-complex="MS Gothic"/>
    </style:style>
    <style:style style:name="T342" style:parent-style-name="DefaultParagraphFont" style:family="text">
      <style:text-properties style:font-name="Calibri" style:font-name-complex="Calibri"/>
    </style:style>
    <style:style style:name="T343" style:parent-style-name="DefaultParagraphFont" style:family="text">
      <style:text-properties style:font-name="MS Gothic" style:font-name-asian="MS Gothic" style:font-name-complex="MS Gothic"/>
    </style:style>
    <style:style style:name="T344" style:parent-style-name="DefaultParagraphFont" style:family="text">
      <style:text-properties style:font-name="Calibri" style:font-name-complex="Calibri"/>
    </style:style>
    <style:style style:name="T345" style:parent-style-name="DefaultParagraphFont" style:family="text">
      <style:text-properties style:font-name="MS Gothic" style:font-name-asian="MS Gothic" style:font-name-complex="MS Gothic"/>
    </style:style>
    <style:style style:name="T346" style:parent-style-name="DefaultParagraphFont" style:family="text">
      <style:text-properties style:font-name="Calibri" style:font-name-complex="Calibri"/>
    </style:style>
    <style:style style:name="T347" style:parent-style-name="DefaultParagraphFont" style:family="text">
      <style:text-properties style:font-name="MS Gothic" style:font-name-asian="MS Gothic" style:font-name-complex="MS Gothic"/>
    </style:style>
    <style:style style:name="T348" style:parent-style-name="DefaultParagraphFont" style:family="text">
      <style:text-properties style:font-name="Calibri" style:font-name-complex="Calibri"/>
    </style:style>
    <style:style style:name="T349" style:parent-style-name="DefaultParagraphFont" style:family="text">
      <style:text-properties style:font-name="MS Gothic" style:font-name-asian="MS Gothic" style:font-name-complex="MS Gothic"/>
    </style:style>
    <style:style style:name="T350" style:parent-style-name="DefaultParagraphFont" style:family="text">
      <style:text-properties style:font-name="Calibri" style:font-name-complex="Calibri"/>
    </style:style>
    <style:style style:name="T351" style:parent-style-name="DefaultParagraphFont" style:family="text">
      <style:text-properties style:font-name="MS Gothic" style:font-name-asian="MS Gothic" style:font-name-complex="MS Gothic"/>
    </style:style>
    <style:style style:name="T352" style:parent-style-name="DefaultParagraphFont" style:family="text">
      <style:text-properties style:font-name="Calibri" style:font-name-complex="Calibri"/>
    </style:style>
    <style:style style:name="T353" style:parent-style-name="DefaultParagraphFont" style:family="text">
      <style:text-properties style:font-name="MS Gothic" style:font-name-asian="MS Gothic" style:font-name-complex="MS Gothic"/>
    </style:style>
    <style:style style:name="T354" style:parent-style-name="DefaultParagraphFont" style:family="text">
      <style:text-properties style:font-name="Calibri" style:font-name-complex="Calibri"/>
    </style:style>
    <style:style style:name="T355" style:parent-style-name="DefaultParagraphFont" style:family="text">
      <style:text-properties style:font-name="MS Gothic" style:font-name-asian="MS Gothic" style:font-name-complex="MS Gothic"/>
    </style:style>
    <style:style style:name="T356" style:parent-style-name="DefaultParagraphFont" style:family="text">
      <style:text-properties style:font-name="Calibri" style:font-name-complex="Calibri"/>
    </style:style>
    <style:style style:name="T357" style:parent-style-name="DefaultParagraphFont" style:family="text">
      <style:text-properties style:font-name="MS Gothic" style:font-name-asian="MS Gothic" style:font-name-complex="MS Gothic"/>
    </style:style>
    <style:style style:name="T358" style:parent-style-name="DefaultParagraphFont" style:family="text">
      <style:text-properties style:font-name="Calibri" style:font-name-complex="Calibri"/>
    </style:style>
    <style:style style:name="T359" style:parent-style-name="DefaultParagraphFont" style:family="text">
      <style:text-properties style:font-name="MS Gothic" style:font-name-asian="MS Gothic" style:font-name-complex="MS Gothic"/>
    </style:style>
    <style:style style:name="T360" style:parent-style-name="DefaultParagraphFont" style:family="text">
      <style:text-properties style:font-name="Calibri" style:font-name-complex="Calibri"/>
    </style:style>
    <style:style style:name="T361" style:parent-style-name="DefaultParagraphFont" style:family="text">
      <style:text-properties style:font-name="MS Gothic" style:font-name-asian="MS Gothic" style:font-name-complex="MS Gothic"/>
    </style:style>
    <style:style style:name="T362" style:parent-style-name="DefaultParagraphFont" style:family="text">
      <style:text-properties style:font-name="Calibri" style:font-name-complex="Calibri"/>
    </style:style>
    <style:style style:name="T363" style:parent-style-name="DefaultParagraphFont" style:family="text">
      <style:text-properties style:font-name="MS Gothic" style:font-name-asian="MS Gothic" style:font-name-complex="MS Gothic"/>
    </style:style>
    <style:style style:name="T364" style:parent-style-name="DefaultParagraphFont" style:family="text">
      <style:text-properties style:font-name="Calibri" style:font-name-complex="Calibri"/>
    </style:style>
    <style:style style:name="T365" style:parent-style-name="DefaultParagraphFont" style:family="text">
      <style:text-properties style:font-name="MS Gothic" style:font-name-asian="MS Gothic" style:font-name-complex="MS Gothic"/>
    </style:style>
    <style:style style:name="T366" style:parent-style-name="DefaultParagraphFont" style:family="text">
      <style:text-properties style:font-name="Calibri" style:font-name-complex="Calibri"/>
    </style:style>
    <style:style style:name="T367" style:parent-style-name="DefaultParagraphFont" style:family="text">
      <style:text-properties style:font-name="MS Gothic" style:font-name-asian="MS Gothic" style:font-name-complex="MS Gothic"/>
    </style:style>
    <style:style style:name="T368" style:parent-style-name="DefaultParagraphFont" style:family="text">
      <style:text-properties style:font-name="Calibri" style:font-name-complex="Calibri"/>
    </style:style>
    <style:style style:name="T369" style:parent-style-name="DefaultParagraphFont" style:family="text">
      <style:text-properties style:font-name="MS Gothic" style:font-name-asian="MS Gothic" style:font-name-complex="MS Gothic"/>
    </style:style>
    <style:style style:name="T370" style:parent-style-name="DefaultParagraphFont" style:family="text">
      <style:text-properties style:font-name="Calibri" style:font-name-complex="Calibri"/>
    </style:style>
    <style:style style:name="T371" style:parent-style-name="DefaultParagraphFont" style:family="text">
      <style:text-properties style:font-name="MS Gothic" style:font-name-asian="MS Gothic" style:font-name-complex="MS Gothic"/>
    </style:style>
    <style:style style:name="T372" style:parent-style-name="DefaultParagraphFont" style:family="text">
      <style:text-properties style:font-name="Calibri" style:font-name-complex="Calibri"/>
    </style:style>
    <style:style style:name="T373" style:parent-style-name="DefaultParagraphFont" style:family="text">
      <style:text-properties style:font-name="MS Gothic" style:font-name-asian="MS Gothic" style:font-name-complex="MS Gothic"/>
    </style:style>
    <style:style style:name="T374" style:parent-style-name="DefaultParagraphFont" style:family="text">
      <style:text-properties style:font-name="Calibri" style:font-name-complex="Calibri"/>
    </style:style>
    <style:style style:name="T375" style:parent-style-name="DefaultParagraphFont" style:family="text">
      <style:text-properties style:font-name="MS Gothic" style:font-name-asian="MS Gothic" style:font-name-complex="MS Gothic"/>
    </style:style>
    <style:style style:name="T376" style:parent-style-name="DefaultParagraphFont" style:family="text">
      <style:text-properties style:font-name="Calibri" style:font-name-complex="Calibri"/>
    </style:style>
    <style:style style:name="T377" style:parent-style-name="DefaultParagraphFont" style:family="text">
      <style:text-properties style:font-name="MS Gothic" style:font-name-asian="MS Gothic" style:font-name-complex="MS Gothic"/>
    </style:style>
    <style:style style:name="T378" style:parent-style-name="DefaultParagraphFont" style:family="text">
      <style:text-properties style:font-name="Calibri" style:font-name-complex="Calibri"/>
    </style:style>
    <style:style style:name="P379" style:parent-style-name="Normal" style:family="paragraph">
      <style:text-properties fo:font-weight="bold" style:font-weight-asian="bold" style:font-weight-complex="bold"/>
    </style:style>
    <style:style style:name="P380" style:parent-style-name="Normal" style:family="paragraph">
      <style:text-properties fo:font-weight="bold" style:font-weight-asian="bold" style:font-weight-complex="bold"/>
    </style:style>
    <style:style style:name="P381" style:parent-style-name="Normal" style:family="paragraph">
      <style:text-properties fo:font-weight="bold" style:font-weight-asian="bold" style:font-weight-complex="bold"/>
    </style:style>
    <style:style style:name="P382" style:parent-style-name="Normal" style:family="paragraph">
      <style:text-properties fo:font-weight="bold" style:font-weight-asian="bold" style:font-weight-complex="bold"/>
    </style:style>
    <style:style style:name="P383" style:parent-style-name="Normal" style:family="paragraph">
      <style:text-properties fo:font-weight="bold" style:font-weight-asian="bold" style:font-weight-complex="bold"/>
    </style:style>
    <style:style style:name="P384" style:parent-style-name="Normal" style:family="paragraph">
      <style:text-properties fo:font-weight="bold" style:font-weight-asian="bold" style:font-weight-complex="bold"/>
    </style:style>
    <style:style style:name="P385" style:parent-style-name="Normal" style:family="paragraph">
      <style:text-properties fo:font-weight="bold" style:font-weight-asian="bold" style:font-weight-complex="bold"/>
    </style:style>
    <style:style style:name="P386" style:parent-style-name="Normal" style:family="paragraph">
      <style:text-properties fo:font-weight="bold" style:font-weight-asian="bold" style:font-weight-complex="bold"/>
    </style:style>
    <style:style style:name="P387" style:parent-style-name="Normal" style:family="paragraph">
      <style:text-properties fo:font-weight="bold" style:font-weight-asian="bold" style:font-weight-complex="bold"/>
    </style:style>
    <style:style style:name="P388" style:parent-style-name="Normal" style:family="paragraph">
      <style:text-properties fo:font-weight="bold" style:font-weight-asian="bold" style:font-weight-complex="bold"/>
    </style:style>
    <style:style style:name="P389" style:parent-style-name="Normal" style:family="paragraph">
      <style:text-properties fo:font-weight="bold" style:font-weight-asian="bold" style:font-weight-complex="bold"/>
    </style:style>
    <style:style style:name="P390" style:parent-style-name="Normal" style:family="paragraph">
      <style:text-properties fo:font-weight="bold" style:font-weight-asian="bold" style:font-weight-complex="bold"/>
    </style:style>
    <style:style style:name="P391" style:parent-style-name="Normal" style:family="paragraph">
      <style:text-properties fo:font-weight="bold" style:font-weight-asian="bold" style:font-weight-complex="bold"/>
    </style:style>
    <style:style style:name="P392" style:parent-style-name="Normal" style:family="paragraph">
      <style:text-properties fo:font-weight="bold" style:font-weight-asian="bold" style:font-weight-complex="bold"/>
    </style:style>
    <style:style style:name="P393" style:parent-style-name="Normal" style:family="paragraph">
      <style:text-properties fo:font-weight="bold" style:font-weight-asian="bold" style:font-weight-complex="bold"/>
    </style:style>
    <style:style style:name="P394" style:parent-style-name="Normal" style:family="paragraph">
      <style:text-properties fo:font-weight="bold" style:font-weight-asian="bold" style:font-weight-complex="bold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P396" style:parent-style-name="Normal" style:family="paragraph">
      <style:text-properties fo:font-weight="bold" style:font-weight-asian="bold" style:font-weight-complex="bold"/>
    </style:style>
    <style:style style:name="P397" style:parent-style-name="Normal" style:family="paragraph">
      <style:text-properties fo:font-weight="bold" style:font-weight-asian="bold" style:font-weight-complex="bold"/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P399" style:parent-style-name="Normal" style:family="paragraph">
      <style:text-properties fo:font-weight="bold" style:font-weight-asian="bold" style:font-weight-complex="bold"/>
    </style:style>
    <style:style style:name="P400" style:parent-style-name="Normal" style:family="paragraph">
      <style:text-properties fo:font-weight="bold" style:font-weight-asian="bold" style:font-weight-complex="bold"/>
    </style:style>
    <style:style style:name="P401" style:parent-style-name="Normal" style:family="paragraph">
      <style:text-properties fo:font-weight="bold" style:font-weight-asian="bold" style:font-weight-complex="bold"/>
    </style:style>
    <style:style style:name="P402" style:parent-style-name="Normal" style:family="paragraph">
      <style:text-properties fo:font-weight="bold" style:font-weight-asian="bold" style:font-weight-complex="bold"/>
    </style:style>
    <style:style style:name="P403" style:parent-style-name="Normal" style:family="paragraph">
      <style:text-properties fo:font-weight="bold" style:font-weight-asian="bold" style:font-weight-complex="bold"/>
    </style:style>
    <style:style style:name="P404" style:parent-style-name="Normal" style:family="paragraph">
      <style:text-properties fo:font-weight="bold" style:font-weight-asian="bold" style:font-weight-complex="bold"/>
    </style:style>
    <style:style style:name="P405" style:parent-style-name="Normal" style:family="paragraph">
      <style:text-properties fo:font-weight="bold" style:font-weight-asian="bold" style:font-weight-complex="bold"/>
    </style:style>
    <style:style style:name="P406" style:parent-style-name="Normal" style:family="paragraph">
      <style:text-properties fo:font-weight="bold" style:font-weight-asian="bold" style:font-weight-complex="bold"/>
    </style:style>
    <style:style style:name="P407" style:parent-style-name="Normal" style:family="paragraph">
      <style:text-properties fo:font-weight="bold" style:font-weight-asian="bold" style:font-weight-complex="bold"/>
    </style:style>
    <style:style style:name="P408" style:parent-style-name="Normal" style:family="paragraph">
      <style:text-properties fo:font-weight="bold" style:font-weight-asian="bold" style:font-weight-complex="bold"/>
    </style:style>
    <style:style style:name="P409" style:parent-style-name="Normal" style:family="paragraph">
      <style:text-properties fo:font-weight="bold" style:font-weight-asian="bold" style:font-weight-complex="bold"/>
    </style:style>
    <style:style style:name="P410" style:parent-style-name="Normal" style:family="paragraph">
      <style:text-properties fo:font-weight="bold" style:font-weight-asian="bold" style:font-weight-complex="bold"/>
    </style:style>
    <style:style style:name="P411" style:parent-style-name="Normal" style:family="paragraph">
      <style:text-properties fo:font-weight="bold" style:font-weight-asian="bold" style:font-weight-complex="bold"/>
    </style:style>
    <style:style style:name="P412" style:parent-style-name="Normal" style:family="paragraph">
      <style:text-properties fo:font-weight="bold" style:font-weight-asian="bold" style:font-weight-complex="bold"/>
    </style:style>
    <style:style style:name="P413" style:parent-style-name="Normal" style:family="paragraph">
      <style:text-properties fo:font-weight="bold" style:font-weight-asian="bold" style:font-weight-complex="bold"/>
    </style:style>
    <style:style style:name="P414" style:parent-style-name="Normal" style:family="paragraph">
      <style:text-properties fo:font-weight="bold" style:font-weight-asian="bold" style:font-weight-complex="bold"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Below is the<text:s/><text:span text:style-name="T2">full final blueprint</text:span><text:s/>for your AI social media agent platform using your existing stack:</text:p>
      <text:p text:style-name="Normal">Node.js</text:p>
      <text:p text:style-name="Normal">Express.js</text:p>
      <text:p text:style-name="Normal">MongoDB</text:p>
      <text:p text:style-name="Normal">Mongoose</text:p>
      <text:p text:style-name="Normal">EJS</text:p>
      <text:p text:style-name="Normal">HTML</text:p>
      <text:p text:style-name="Normal">CSS</text:p>
      <text:p text:style-name="Normal">JavaScript</text:p>
      <text:p text:style-name="Normal">Cloudinary</text:p>
      <text:p text:style-name="Normal">Google Login</text:p>
      <text:p text:style-name="Normal">OpenAI API</text:p>
      <text:p text:style-name="Normal">Facebook / YouTube / Instagram APIs</text:p>
      <text:p text:style-name="Normal">The platform goal:</text:p>
      <text:p text:style-name="Normal">Users create brands/businesses</text:p>
      <text:p text:style-name="Normal">AI creates posts, captions, hashtags, scripts, and content calendars</text:p>
      <text:p text:style-name="Normal">System creates cheap template videos</text:p>
      <text:p text:style-name="Normal">Users approve or schedule posts</text:p>
      <text:p text:style-name="Normal">System posts automatically to Facebook, YouTube, Instagram, and more</text:p>
      <text:p text:style-name="Normal">Users track analytics, drafts, failed posts, and campaign performance</text:p>
      <text:p text:style-name="Normal"><draw:custom-shape svg:x="0in" svg:y="0in" svg:width="45.51042in" svg:height="0.00139in" draw:z-index="0" draw:id="id0" draw:style-name="a0" draw:name="Horizontal Line 241" text:anchor-type="as-char"><svg:title/><svg:desc/><draw:enhanced-geometry draw:type="non-primitive" svg:viewBox="0 0 21600 21600" draw:enhanced-path="M 0 0 L 21600 0 21600 21600 0 21600 Z N"/></draw:custom-shape></text:p>
      <text:p text:style-name="P3">1. Platform name ideas</text:p>
      <text:p text:style-name="Normal">You can choose one:</text:p>
      <text:p text:style-name="Normal">AutoBrand AI</text:p>
      <text:p text:style-name="Normal">SocialPilot Agent</text:p>
      <text:p text:style-name="Normal">PostAgent AI</text:p>
      <text:p text:style-name="Normal">BrandFlow AI</text:p>
      <text:p text:style-name="Normal">SocialFlow AI</text:p>
      <text:p text:style-name="Normal">ContentAgent AI</text:p>
      <text:p text:style-name="Normal">PromoPilot AI</text:p>
      <text:p text:style-name="Normal">Best one for your concept:</text:p>
      <text:soft-page-break/>
      <text:p text:style-name="Normal">AutoBrand AI</text:p>
      <text:p text:style-name="Normal">Because it sounds like:</text:p>
      <text:p text:style-name="Normal">AI for brands</text:p>
      <text:p text:style-name="Normal">Social media automation</text:p>
      <text:p text:style-name="Normal">Automatic content creation</text:p>
      <text:p text:style-name="Normal">Automatic posting</text:p>
      <text:p text:style-name="Normal"><draw:custom-shape svg:x="0in" svg:y="0in" svg:width="45.51042in" svg:height="0.00139in" draw:z-index="0" draw:id="id1" draw:style-name="a1" draw:name="Horizontal Line 242" text:anchor-type="as-char"><svg:title/><svg:desc/><draw:enhanced-geometry draw:type="non-primitive" svg:viewBox="0 0 21600 21600" draw:enhanced-path="M 0 0 L 21600 0 21600 21600 0 21600 Z N"/></draw:custom-shape></text:p>
      <text:p text:style-name="P4">2. Main platform idea</text:p>
      <text:p text:style-name="Normal">Your platform will help users do this:</text:p>
      <text:p text:style-name="Normal">1. Create an account</text:p>
      <text:p text:style-name="Normal">2. Create a brand/business profile</text:p>
      <text:p text:style-name="Normal">3. Connect social media accounts</text:p>
      <text:p text:style-name="Normal">4. Ask AI to generate content</text:p>
      <text:p text:style-name="Normal">5. Save generated content as drafts</text:p>
      <text:p text:style-name="Normal">6. Edit posts</text:p>
      <text:p text:style-name="Normal">7. Schedule posts</text:p>
      <text:p text:style-name="Normal">8. Automatically publish posts</text:p>
      <text:p text:style-name="Normal">9. Track analytics</text:p>
      <text:p text:style-name="Normal">10. Reuse best-performing content</text:p>
      <text:p text:style-name="Normal"><draw:custom-shape svg:x="0in" svg:y="0in" svg:width="45.51042in" svg:height="0.00139in" draw:z-index="0" draw:id="id2" draw:style-name="a2" draw:name="Horizontal Line 243" text:anchor-type="as-char"><svg:title/><svg:desc/><draw:enhanced-geometry draw:type="non-primitive" svg:viewBox="0 0 21600 21600" draw:enhanced-path="M 0 0 L 21600 0 21600 21600 0 21600 Z N"/></draw:custom-shape></text:p>
      <text:p text:style-name="P5">3. Main users of the platform</text:p>
      <text:p text:style-name="Normal">The platform should support:</text:p>
      <text:p text:style-name="Normal">Small businesses</text:p>
      <text:p text:style-name="Normal">Agencies</text:p>
      <text:p text:style-name="Normal">Content creators</text:p>
      <text:p text:style-name="Normal">Churches</text:p>
      <text:p text:style-name="Normal">Schools</text:p>
      <text:p text:style-name="Normal">Shops</text:p>
      <text:p text:style-name="Normal">Internet hotspot businesses</text:p>
      <text:p text:style-name="Normal">Restaurants</text:p>
      <text:p text:style-name="Normal">Real estate agents</text:p>
      <text:soft-page-break/>
      <text:p text:style-name="Normal">Event organizers</text:p>
      <text:p text:style-name="Normal">Hotels</text:p>
      <text:p text:style-name="Normal">Travel companies</text:p>
      <text:p text:style-name="Normal">Online stores</text:p>
      <text:p text:style-name="Normal">Personal brands</text:p>
      <text:p text:style-name="Normal"><draw:custom-shape svg:x="0in" svg:y="0in" svg:width="45.51042in" svg:height="0.00139in" draw:z-index="0" draw:id="id3" draw:style-name="a3" draw:name="Horizontal Line 244" text:anchor-type="as-char"><svg:title/><svg:desc/><draw:enhanced-geometry draw:type="non-primitive" svg:viewBox="0 0 21600 21600" draw:enhanced-path="M 0 0 L 21600 0 21600 21600 0 21600 Z N"/></draw:custom-shape></text:p>
      <text:p text:style-name="P6">4. User roles</text:p>
      <text:p text:style-name="P7">1. Super Admin</text:p>
      <text:p text:style-name="Normal">Controls the whole system.</text:p>
      <text:p text:style-name="Normal">Can manage:</text:p>
      <text:p text:style-name="Normal">Users</text:p>
      <text:p text:style-name="Normal">Brands</text:p>
      <text:p text:style-name="Normal">Posts</text:p>
      <text:p text:style-name="Normal">Subscriptions</text:p>
      <text:p text:style-name="Normal">AI usage</text:p>
      <text:p text:style-name="Normal">API usage</text:p>
      <text:p text:style-name="Normal">Failed posts</text:p>
      <text:p text:style-name="Normal">Reports</text:p>
      <text:p text:style-name="Normal">Social platform connections</text:p>
      <text:p text:style-name="Normal">Templates</text:p>
      <text:p text:style-name="Normal">Payments</text:p>
      <text:p text:style-name="Normal">System settings</text:p>
      <text:p text:style-name="Normal">Abuse/spam reports</text:p>
      <text:p text:style-name="P8">2. Agency Owner</text:p>
      <text:p text:style-name="Normal">For users managing multiple client brands.</text:p>
      <text:p text:style-name="Normal">Can manage:</text:p>
      <text:p text:style-name="Normal">Multiple brands</text:p>
      <text:p text:style-name="Normal">Team members</text:p>
      <text:p text:style-name="Normal">Client approval</text:p>
      <text:p text:style-name="Normal">Post scheduling</text:p>
      <text:p text:style-name="Normal">Analytics</text:p>
      <text:soft-page-break/>
      <text:p text:style-name="Normal">Billing</text:p>
      <text:p text:style-name="Normal">Campaigns</text:p>
      <text:p text:style-name="Normal">Reports</text:p>
      <text:p text:style-name="P9">3. Brand Owner</text:p>
      <text:p text:style-name="Normal">Normal business owner.</text:p>
      <text:p text:style-name="Normal">Can manage:</text:p>
      <text:p text:style-name="Normal">One or more brands</text:p>
      <text:p text:style-name="Normal">Social accounts</text:p>
      <text:p text:style-name="Normal">Posts</text:p>
      <text:p text:style-name="Normal">Media</text:p>
      <text:p text:style-name="Normal">Calendar</text:p>
      <text:p text:style-name="Normal">Analytics</text:p>
      <text:p text:style-name="Normal">Team members</text:p>
      <text:p text:style-name="Normal">Billing</text:p>
      <text:p text:style-name="P10">4. Content Creator</text:p>
      <text:p text:style-name="Normal">Can create content but may not publish directly.</text:p>
      <text:p text:style-name="Normal">Can manage:</text:p>
      <text:p text:style-name="Normal">Draft posts</text:p>
      <text:p text:style-name="Normal">Media upload</text:p>
      <text:p text:style-name="Normal">AI generation</text:p>
      <text:p text:style-name="Normal">Campaign ideas</text:p>
      <text:p text:style-name="Normal">Video scripts</text:p>
      <text:p text:style-name="P11">5. Client Reviewer</text:p>
      <text:p text:style-name="Normal">Can review posts before they go live.</text:p>
      <text:p text:style-name="Normal">Can:</text:p>
      <text:p text:style-name="Normal">View pending posts</text:p>
      <text:p text:style-name="Normal">Approve posts</text:p>
      <text:p text:style-name="Normal">Reject posts</text:p>
      <text:p text:style-name="Normal">Comment on posts</text:p>
      <text:p text:style-name="P12">6. Team Member</text:p>
      <text:p text:style-name="Normal">Limited user.</text:p>
      <text:soft-page-break/>
      <text:p text:style-name="Normal">Can:</text:p>
      <text:p text:style-name="Normal">View assigned brands</text:p>
      <text:p text:style-name="Normal">Create drafts</text:p>
      <text:p text:style-name="Normal">Edit assigned posts</text:p>
      <text:p text:style-name="Normal">Upload media</text:p>
      <text:p text:style-name="Normal">View analytics if allowed</text:p>
      <text:p text:style-name="Normal"><draw:custom-shape svg:x="0in" svg:y="0in" svg:width="45.51042in" svg:height="0.00139in" draw:z-index="0" draw:id="id4" draw:style-name="a4" draw:name="Horizontal Line 245" text:anchor-type="as-char"><svg:title/><svg:desc/><draw:enhanced-geometry draw:type="non-primitive" svg:viewBox="0 0 21600 21600" draw:enhanced-path="M 0 0 L 21600 0 21600 21600 0 21600 Z N"/></draw:custom-shape></text:p>
      <text:p text:style-name="P13">5. Final feature list</text:p>
      <text:p text:style-name="P14">A. Authentication features</text:p>
      <text:p text:style-name="Normal">Include:</text:p>
      <text:p text:style-name="Normal">Register</text:p>
      <text:p text:style-name="Normal">Login</text:p>
      <text:p text:style-name="Normal">Logout</text:p>
      <text:p text:style-name="Normal">Google login/signup</text:p>
      <text:p text:style-name="Normal">Forgot password</text:p>
      <text:p text:style-name="Normal">Reset password</text:p>
      <text:p text:style-name="Normal">Email verification</text:p>
      <text:p text:style-name="Normal">Change password</text:p>
      <text:p text:style-name="Normal">Profile update</text:p>
      <text:p text:style-name="Normal">Role-based access</text:p>
      <text:p text:style-name="Normal">Session protection</text:p>
      <text:p text:style-name="P15">B. Brand management features</text:p>
      <text:p text:style-name="Normal">Each user can create many brands.</text:p>
      <text:p text:style-name="Normal">Brand fields:</text:p>
      <text:p text:style-name="Normal">Brand name</text:p>
      <text:p text:style-name="Normal">Logo</text:p>
      <text:p text:style-name="Normal">Business type</text:p>
      <text:p text:style-name="Normal">Description</text:p>
      <text:p text:style-name="Normal">Website</text:p>
      <text:p text:style-name="Normal">Location</text:p>
      <text:p text:style-name="Normal">Language</text:p>
      <text:soft-page-break/>
      <text:p text:style-name="Normal">Target audience</text:p>
      <text:p text:style-name="Normal">Brand tone</text:p>
      <text:p text:style-name="Normal">Products/services</text:p>
      <text:p text:style-name="Normal">Prices/offers</text:p>
      <text:p text:style-name="Normal">Business goal</text:p>
      <text:p text:style-name="Normal">Preferred hashtags</text:p>
      <text:p text:style-name="Normal">Blocked words</text:p>
      <text:p text:style-name="Normal">Competitors</text:p>
      <text:p text:style-name="Normal">Social links</text:p>
      <text:p text:style-name="Normal">Posting frequency</text:p>
      <text:p text:style-name="Normal">Brand colors</text:p>
      <text:p text:style-name="Normal">Brand font style</text:p>
      <text:p text:style-name="Normal">This becomes the<text:s/><text:span text:style-name="T16">AI Brand Brain</text:span>.</text:p>
      <text:p text:style-name="Normal"><draw:custom-shape svg:x="0in" svg:y="0in" svg:width="45.51042in" svg:height="0.00139in" draw:z-index="0" draw:id="id5" draw:style-name="a5" draw:name="Horizontal Line 246" text:anchor-type="as-char"><svg:title/><svg:desc/><draw:enhanced-geometry draw:type="non-primitive" svg:viewBox="0 0 21600 21600" draw:enhanced-path="M 0 0 L 21600 0 21600 21600 0 21600 Z N"/></draw:custom-shape></text:p>
      <text:p text:style-name="P17">6. AI Brand Brain</text:p>
      <text:p text:style-name="Normal">This is one of the most important features.</text:p>
      <text:p text:style-name="Normal">The platform should store brand information so AI creates better posts.</text:p>
      <text:p text:style-name="Normal">Example:</text:p>
      <text:p text:style-name="Normal">Brand: Classic Net</text:p>
      <text:p text:style-name="Normal">Business: Hotspot internet vouchers</text:p>
      <text:p text:style-name="Normal">Location: Kampala</text:p>
      <text:p text:style-name="Normal">Audience: Students, shops, local users</text:p>
      <text:p text:style-name="Normal">Tone: Simple, clean, friendly</text:p>
      <text:p text:style-name="Normal">Goal: Sell more daily vouchers</text:p>
      <text:p text:style-name="Normal">Main offer: Affordable internet packages</text:p>
      <text:p text:style-name="Normal">Preferred CTA: Buy voucher now</text:p>
      <text:p text:style-name="Normal">The AI will use this every time it creates content.</text:p>
      <text:p text:style-name="P18">Brand Brain features</text:p>
      <text:p text:style-name="Normal">Brand voice</text:p>
      <text:p text:style-name="Normal">Target customers</text:p>
      <text:p text:style-name="Normal">Business goals</text:p>
      <text:soft-page-break/>
      <text:p text:style-name="Normal">Products/services</text:p>
      <text:p text:style-name="Normal">Offers/prices</text:p>
      <text:p text:style-name="Normal">Preferred language</text:p>
      <text:p text:style-name="Normal">Local style</text:p>
      <text:p text:style-name="Normal">Competitor style</text:p>
      <text:p text:style-name="Normal">Do-not-say words</text:p>
      <text:p text:style-name="Normal">Preferred call-to-action</text:p>
      <text:p text:style-name="Normal">Frequently used hashtags</text:p>
      <text:p text:style-name="Normal">Best performing posts</text:p>
      <text:p text:style-name="Normal">This makes your platform better than normal schedulers because the AI does not create random posts.</text:p>
      <text:p text:style-name="Normal"><draw:custom-shape svg:x="0in" svg:y="0in" svg:width="45.51042in" svg:height="0.00139in" draw:z-index="0" draw:id="id6" draw:style-name="a6" draw:name="Horizontal Line 247" text:anchor-type="as-char"><svg:title/><svg:desc/><draw:enhanced-geometry draw:type="non-primitive" svg:viewBox="0 0 21600 21600" draw:enhanced-path="M 0 0 L 21600 0 21600 21600 0 21600 Z N"/></draw:custom-shape></text:p>
      <text:p text:style-name="P19">7. AI content generator</text:p>
      <text:p text:style-name="Normal">The AI should generate:</text:p>
      <text:p text:style-name="Normal">Facebook posts</text:p>
      <text:p text:style-name="Normal">Instagram captions</text:p>
      <text:p text:style-name="Normal">YouTube titles</text:p>
      <text:p text:style-name="Normal">YouTube descriptions</text:p>
      <text:p text:style-name="Normal">YouTube tags</text:p>
      <text:p text:style-name="Normal">TikTok captions</text:p>
      <text:p text:style-name="Normal">LinkedIn posts</text:p>
      <text:p text:style-name="Normal">X/Twitter posts</text:p>
      <text:p text:style-name="Normal">WhatsApp status messages</text:p>
      <text:p text:style-name="Normal">WhatsApp group promo messages</text:p>
      <text:p text:style-name="Normal">Blog-to-social posts</text:p>
      <text:p text:style-name="Normal">Product promotion posts</text:p>
      <text:p text:style-name="Normal">Event announcement posts</text:p>
      <text:p text:style-name="Normal">Church service announcement posts</text:p>
      <text:p text:style-name="Normal">Real estate posts</text:p>
      <text:p text:style-name="Normal">Voucher/internet package posts</text:p>
      <text:p text:style-name="Normal">Restaurant menu posts</text:p>
      <text:soft-page-break/>
      <text:p text:style-name="Normal">Offer posts</text:p>
      <text:p text:style-name="Normal">Holiday posts</text:p>
      <text:p text:style-name="Normal">Educational posts</text:p>
      <text:p text:style-name="Normal">Testimonial posts</text:p>
      <text:p text:style-name="P20">AI should generate these fields</text:p>
      <text:p text:style-name="Normal">Caption</text:p>
      <text:p text:style-name="Normal">Hashtags</text:p>
      <text:p text:style-name="Normal">Call-to-action</text:p>
      <text:p text:style-name="Normal">Image idea</text:p>
      <text:p text:style-name="Normal">Image prompt</text:p>
      <text:p text:style-name="Normal">Video script</text:p>
      <text:p text:style-name="Normal">Short video title</text:p>
      <text:p text:style-name="Normal">Platform version</text:p>
      <text:p text:style-name="Normal">Best posting time</text:p>
      <text:p text:style-name="Normal">Content score</text:p>
      <text:p text:style-name="Normal">Improvement suggestion</text:p>
      <text:p text:style-name="Normal"><draw:custom-shape svg:x="0in" svg:y="0in" svg:width="45.51042in" svg:height="0.00139in" draw:z-index="0" draw:id="id7" draw:style-name="a7" draw:name="Horizontal Line 248" text:anchor-type="as-char"><svg:title/><svg:desc/><draw:enhanced-geometry draw:type="non-primitive" svg:viewBox="0 0 21600 21600" draw:enhanced-path="M 0 0 L 21600 0 21600 21600 0 21600 Z N"/></draw:custom-shape></text:p>
      <text:p text:style-name="P21">8. AI campaign generator</text:p>
      <text:p text:style-name="Normal">This feature creates a full campaign.</text:p>
      <text:p text:style-name="Normal">User enters:</text:p>
      <text:p text:style-name="Normal">Goal: Sell internet vouchers</text:p>
      <text:p text:style-name="Normal">Duration: 30 days</text:p>
      <text:p text:style-name="Normal">Platforms: Facebook, Instagram, YouTube Shorts</text:p>
      <text:p text:style-name="Normal">Tone: Clean and local</text:p>
      <text:p text:style-name="Normal">Posting frequency: 2 posts per day</text:p>
      <text:p text:style-name="Normal">AI generates:</text:p>
      <text:p text:style-name="Normal">Campaign name</text:p>
      <text:p text:style-name="Normal">Campaign goal</text:p>
      <text:p text:style-name="Normal">30-day calendar</text:p>
      <text:p text:style-name="Normal">Post captions</text:p>
      <text:p text:style-name="Normal">Hashtags</text:p>
      <text:soft-page-break/>
      <text:p text:style-name="Normal">Video scripts</text:p>
      <text:p text:style-name="Normal">Image ideas</text:p>
      <text:p text:style-name="Normal">CTA text</text:p>
      <text:p text:style-name="Normal">Suggested posting times</text:p>
      <text:p text:style-name="Normal">Content categories</text:p>
      <text:p text:style-name="P22">Campaign types</text:p>
      <text:p text:style-name="Normal">Product launch</text:p>
      <text:p text:style-name="Normal">New service</text:p>
      <text:p text:style-name="Normal">Discount campaign</text:p>
      <text:p text:style-name="Normal">Holiday campaign</text:p>
      <text:p text:style-name="Normal">Weekend campaign</text:p>
      <text:p text:style-name="Normal">Event campaign</text:p>
      <text:p text:style-name="Normal">Awareness campaign</text:p>
      <text:p text:style-name="Normal">Lead generation campaign</text:p>
      <text:p text:style-name="Normal">Brand growth campaign</text:p>
      <text:p text:style-name="Normal">Flash sale</text:p>
      <text:p text:style-name="Normal">Church event</text:p>
      <text:p text:style-name="Normal">School announcement</text:p>
      <text:p text:style-name="Normal">Internet voucher promo</text:p>
      <text:p text:style-name="Normal"><draw:custom-shape svg:x="0in" svg:y="0in" svg:width="45.51042in" svg:height="0.00139in" draw:z-index="0" draw:id="id8" draw:style-name="a8" draw:name="Horizontal Line 249" text:anchor-type="as-char"><svg:title/><svg:desc/><draw:enhanced-geometry draw:type="non-primitive" svg:viewBox="0 0 21600 21600" draw:enhanced-path="M 0 0 L 21600 0 21600 21600 0 21600 Z N"/></draw:custom-shape></text:p>
      <text:p text:style-name="P23">9. Content repurposing</text:p>
      <text:p text:style-name="Normal">One content idea should become many posts.</text:p>
      <text:p text:style-name="Normal">Example:</text:p>
      <text:p text:style-name="Normal">Original idea:</text:p>
      <text:p text:style-name="Normal">"Affordable daily internet vouchers"</text:p>
      <text:p text:style-name="Normal"/>
      <text:p text:style-name="Normal">AI creates:</text:p>
      <text:p text:style-name="Normal">Facebook post</text:p>
      <text:p text:style-name="Normal">Instagram caption</text:p>
      <text:p text:style-name="Normal">YouTube Shorts title</text:p>
      <text:p text:style-name="Normal">TikTok caption</text:p>
      <text:soft-page-break/>
      <text:p text:style-name="Normal">LinkedIn post</text:p>
      <text:p text:style-name="Normal">WhatsApp status</text:p>
      <text:p text:style-name="Normal">Short video script</text:p>
      <text:p text:style-name="Normal">Image prompt</text:p>
      <text:p text:style-name="Normal">This is a strong feature because users create many posts from one idea.</text:p>
      <text:p text:style-name="Normal"><draw:custom-shape svg:x="0in" svg:y="0in" svg:width="45.51042in" svg:height="0.00139in" draw:z-index="0" draw:id="id9" draw:style-name="a9" draw:name="Horizontal Line 250" text:anchor-type="as-char"><svg:title/><svg:desc/><draw:enhanced-geometry draw:type="non-primitive" svg:viewBox="0 0 21600 21600" draw:enhanced-path="M 0 0 L 21600 0 21600 21600 0 21600 Z N"/></draw:custom-shape></text:p>
      <text:p text:style-name="P24">10. AI content score</text:p>
      <text:p text:style-name="Normal">Before posting, AI checks the content.</text:p>
      <text:p text:style-name="Normal">Score from 1 to 100.</text:p>
      <text:p text:style-name="Normal">It checks:</text:p>
      <text:p text:style-name="Normal">Is the post clear?</text:p>
      <text:p text:style-name="Normal">Is it too long?</text:p>
      <text:p text:style-name="Normal">Is the CTA strong?</text:p>
      <text:p text:style-name="Normal">Are hashtags good?</text:p>
      <text:p text:style-name="Normal">Is it platform-friendly?</text:p>
      <text:p text:style-name="Normal">Does it match the brand tone?</text:p>
      <text:p text:style-name="Normal">Does it sound spammy?</text:p>
      <text:p text:style-name="Normal">Can it sell better?</text:p>
      <text:p text:style-name="Normal">Example result:</text:p>
      <text:p text:style-name="Normal">Content score: 82/100</text:p>
      <text:p text:style-name="Normal">Suggestion: Add a clearer call-to-action and reduce hashtags.</text:p>
      <text:p text:style-name="Normal"><draw:custom-shape svg:x="0in" svg:y="0in" svg:width="45.51042in" svg:height="0.00139in" draw:z-index="0" draw:id="id10" draw:style-name="a10" draw:name="Horizontal Line 251" text:anchor-type="as-char"><svg:title/><svg:desc/><draw:enhanced-geometry draw:type="non-primitive" svg:viewBox="0 0 21600 21600" draw:enhanced-path="M 0 0 L 21600 0 21600 21600 0 21600 Z N"/></draw:custom-shape></text:p>
      <text:p text:style-name="P25">11. Post editor</text:p>
      <text:p text:style-name="Normal">The post editor should allow users to:</text:p>
      <text:p text:style-name="Normal">Edit caption</text:p>
      <text:p text:style-name="Normal">Edit hashtags</text:p>
      <text:p text:style-name="Normal">Edit title</text:p>
      <text:p text:style-name="Normal">Edit description</text:p>
      <text:p text:style-name="Normal">Add image</text:p>
      <text:p text:style-name="Normal">Add video</text:p>
      <text:p text:style-name="Normal">Add link</text:p>
      <text:soft-page-break/>
      <text:p text:style-name="Normal">Choose platform</text:p>
      <text:p text:style-name="Normal">Preview platform style</text:p>
      <text:p text:style-name="Normal">Choose schedule date</text:p>
      <text:p text:style-name="Normal">Save as draft</text:p>
      <text:p text:style-name="Normal">Send for approval</text:p>
      <text:p text:style-name="Normal">Publish now</text:p>
      <text:p text:style-name="Normal">Schedule later</text:p>
      <text:p text:style-name="P26">Post statuses</text:p>
      <text:p text:style-name="Normal">draft</text:p>
      <text:p text:style-name="Normal">pending_approval</text:p>
      <text:p text:style-name="Normal">approved</text:p>
      <text:p text:style-name="Normal">scheduled</text:p>
      <text:p text:style-name="Normal">publishing</text:p>
      <text:p text:style-name="Normal">published</text:p>
      <text:p text:style-name="Normal">failed</text:p>
      <text:p text:style-name="Normal">cancelled</text:p>
      <text:p text:style-name="Normal">rejected</text:p>
      <text:p text:style-name="Normal"><draw:custom-shape svg:x="0in" svg:y="0in" svg:width="45.51042in" svg:height="0.00139in" draw:z-index="0" draw:id="id11" draw:style-name="a11" draw:name="Horizontal Line 252" text:anchor-type="as-char"><svg:title/><svg:desc/><draw:enhanced-geometry draw:type="non-primitive" svg:viewBox="0 0 21600 21600" draw:enhanced-path="M 0 0 L 21600 0 21600 21600 0 21600 Z N"/></draw:custom-shape></text:p>
      <text:p text:style-name="P27">12. Content calendar</text:p>
      <text:p text:style-name="Normal">The calendar should show:</text:p>
      <text:p text:style-name="Normal">Draft posts</text:p>
      <text:p text:style-name="Normal">Scheduled posts</text:p>
      <text:p text:style-name="Normal">Published posts</text:p>
      <text:p text:style-name="Normal">Failed posts</text:p>
      <text:p text:style-name="Normal">Campaign posts</text:p>
      <text:p text:style-name="Normal">Approval pending posts</text:p>
      <text:p text:style-name="Normal">Views:</text:p>
      <text:p text:style-name="Normal">Monthly view</text:p>
      <text:p text:style-name="Normal">Weekly view</text:p>
      <text:p text:style-name="Normal">Daily view</text:p>
      <text:p text:style-name="Normal">List view</text:p>
      <text:soft-page-break/>
      <text:p text:style-name="Normal">Platform filter</text:p>
      <text:p text:style-name="Normal">Brand filter</text:p>
      <text:p text:style-name="Normal">Status filter</text:p>
      <text:p text:style-name="Normal">Actions:</text:p>
      <text:p text:style-name="Normal">Drag post to new date</text:p>
      <text:p text:style-name="Normal">Reschedule post</text:p>
      <text:p text:style-name="Normal">Open post</text:p>
      <text:p text:style-name="Normal">Edit post</text:p>
      <text:p text:style-name="Normal">Cancel scheduled post</text:p>
      <text:p text:style-name="Normal">Duplicate post</text:p>
      <text:p text:style-name="Normal">Publish now</text:p>
      <text:p text:style-name="Normal"><draw:custom-shape svg:x="0in" svg:y="0in" svg:width="45.51042in" svg:height="0.00139in" draw:z-index="0" draw:id="id12" draw:style-name="a12" draw:name="Horizontal Line 253" text:anchor-type="as-char"><svg:title/><svg:desc/><draw:enhanced-geometry draw:type="non-primitive" svg:viewBox="0 0 21600 21600" draw:enhanced-path="M 0 0 L 21600 0 21600 21600 0 21600 Z N"/></draw:custom-shape></text:p>
      <text:p text:style-name="P28">13. Scheduling system</text:p>
      <text:p text:style-name="Normal">Use:</text:p>
      <text:p text:style-name="Normal">node-cron for simple checking</text:p>
      <text:p text:style-name="Normal">BullMQ + Redis for better scheduled jobs</text:p>
      <text:p text:style-name="Normal">Recommended:</text:p>
      <text:p text:style-name="Normal">Use BullMQ + Redis for production</text:p>
      <text:p text:style-name="Normal">Flow:</text:p>
      <text:p text:style-name="Normal">User schedules post</text:p>
      <text:p text:style-name="Normal">Post status becomes scheduled</text:p>
      <text:p text:style-name="Normal">Worker checks scheduled time</text:p>
      <text:p text:style-name="Normal">Worker publishes post</text:p>
      <text:p text:style-name="Normal">If success, status becomes published</text:p>
      <text:p text:style-name="Normal">If failed, status becomes failed</text:p>
      <text:p text:style-name="Normal">System stores error</text:p>
      <text:p text:style-name="Normal">System retries if allowed</text:p>
      <text:p text:style-name="Normal"><draw:custom-shape svg:x="0in" svg:y="0in" svg:width="45.51042in" svg:height="0.00139in" draw:z-index="0" draw:id="id13" draw:style-name="a13" draw:name="Horizontal Line 254" text:anchor-type="as-char"><svg:title/><svg:desc/><draw:enhanced-geometry draw:type="non-primitive" svg:viewBox="0 0 21600 21600" draw:enhanced-path="M 0 0 L 21600 0 21600 21600 0 21600 Z N"/></draw:custom-shape></text:p>
      <text:p text:style-name="P29">14. Auto-posting platforms</text:p>
      <text:p text:style-name="P30">Stage 1</text:p>
      <text:p text:style-name="Normal">Start with:</text:p>
      <text:soft-page-break/>
      <text:p text:style-name="Normal">Facebook Pages</text:p>
      <text:p text:style-name="Normal">Because it is the best first platform for business posts.</text:p>
      <text:p text:style-name="P31">Stage 2</text:p>
      <text:p text:style-name="Normal">Add:</text:p>
      <text:p text:style-name="Normal">Instagram Business</text:p>
      <text:p text:style-name="Normal">YouTube</text:p>
      <text:p text:style-name="P32">Stage 3</text:p>
      <text:p text:style-name="Normal">Add:</text:p>
      <text:p text:style-name="Normal">LinkedIn</text:p>
      <text:p text:style-name="Normal">TikTok</text:p>
      <text:p text:style-name="Normal">X/Twitter</text:p>
      <text:p text:style-name="Normal">Pinterest</text:p>
      <text:p text:style-name="P33">Important</text:p>
      <text:p text:style-name="Normal">Never collect social media passwords.</text:p>
      <text:p text:style-name="Normal">Use:</text:p>
      <text:p text:style-name="Normal">OAuth login</text:p>
      <text:p text:style-name="Normal">Access tokens</text:p>
      <text:p text:style-name="Normal">Refresh tokens</text:p>
      <text:p text:style-name="Normal">Official APIs</text:p>
      <text:p text:style-name="Normal"><draw:custom-shape svg:x="0in" svg:y="0in" svg:width="45.51042in" svg:height="0.00139in" draw:z-index="0" draw:id="id14" draw:style-name="a14" draw:name="Horizontal Line 255" text:anchor-type="as-char"><svg:title/><svg:desc/><draw:enhanced-geometry draw:type="non-primitive" svg:viewBox="0 0 21600 21600" draw:enhanced-path="M 0 0 L 21600 0 21600 21600 0 21600 Z N"/></draw:custom-shape></text:p>
      <text:p text:style-name="P34">15. Social account connection</text:p>
      <text:p text:style-name="Normal">Users should connect accounts from dashboard.</text:p>
      <text:p text:style-name="Normal">Supported accounts:</text:p>
      <text:p text:style-name="Normal">Facebook Page</text:p>
      <text:p text:style-name="Normal">Instagram Business Account</text:p>
      <text:p text:style-name="Normal">YouTube Channel</text:p>
      <text:p text:style-name="Normal">LinkedIn Page</text:p>
      <text:p text:style-name="Normal">TikTok Business Account</text:p>
      <text:p text:style-name="Normal">X/Twitter Account</text:p>
      <text:p text:style-name="Normal">Pinterest Account</text:p>
      <text:p text:style-name="Normal">Social account fields:</text:p>
      <text:soft-page-break/>
      <text:p text:style-name="Normal">Platform</text:p>
      <text:p text:style-name="Normal">Account name</text:p>
      <text:p text:style-name="Normal">Account ID</text:p>
      <text:p text:style-name="Normal">Access token</text:p>
      <text:p text:style-name="Normal">Refresh token</text:p>
      <text:p text:style-name="Normal">Token expiry date</text:p>
      <text:p text:style-name="Normal">Permissions</text:p>
      <text:p text:style-name="Normal">Status</text:p>
      <text:p text:style-name="Normal">Connected date</text:p>
      <text:p text:style-name="Normal">Last sync date</text:p>
      <text:p text:style-name="Normal">Statuses:</text:p>
      <text:p text:style-name="Normal">connected</text:p>
      <text:p text:style-name="Normal">expired</text:p>
      <text:p text:style-name="Normal">disconnected</text:p>
      <text:p text:style-name="Normal">needs_reconnect</text:p>
      <text:p text:style-name="Normal">failed</text:p>
      <text:p text:style-name="Normal"><draw:custom-shape svg:x="0in" svg:y="0in" svg:width="45.51042in" svg:height="0.00139in" draw:z-index="0" draw:id="id15" draw:style-name="a15" draw:name="Horizontal Line 256" text:anchor-type="as-char"><svg:title/><svg:desc/><draw:enhanced-geometry draw:type="non-primitive" svg:viewBox="0 0 21600 21600" draw:enhanced-path="M 0 0 L 21600 0 21600 21600 0 21600 Z N"/></draw:custom-shape></text:p>
      <text:p text:style-name="P35">16. Cheap video system</text:p>
      <text:p text:style-name="Normal">To avoid expensive full AI video generation, use template videos first.</text:p>
      <text:p text:style-name="P36">Cheap video flow</text:p>
      <text:p text:style-name="Normal">AI creates video script</text:p>
      <text:p text:style-name="Normal">AI creates short scenes</text:p>
      <text:p text:style-name="Normal">User selects template</text:p>
      <text:p text:style-name="Normal">System fills template with text, images, logo, CTA</text:p>
      <text:p text:style-name="Normal">System creates video</text:p>
      <text:p text:style-name="Normal">Video is saved to Cloudinary</text:p>
      <text:p text:style-name="Normal">User schedules or posts it</text:p>
      <text:p text:style-name="P37">Template video types</text:p>
      <text:p text:style-name="Normal">Business promo</text:p>
      <text:p text:style-name="Normal">Product promo</text:p>
      <text:p text:style-name="Normal">Flash sale</text:p>
      <text:soft-page-break/>
      <text:p text:style-name="Normal">Quote video</text:p>
      <text:p text:style-name="Normal">Event announcement</text:p>
      <text:p text:style-name="Normal">Church service announcement</text:p>
      <text:p text:style-name="Normal">Internet voucher advert</text:p>
      <text:p text:style-name="Normal">Restaurant menu video</text:p>
      <text:p text:style-name="Normal">Real estate property promo</text:p>
      <text:p text:style-name="Normal">Hotel offer video</text:p>
      <text:p text:style-name="Normal">Travel package video</text:p>
      <text:p text:style-name="Normal">Testimonial video</text:p>
      <text:p text:style-name="Normal">Before/after video</text:p>
      <text:p text:style-name="Normal">Educational tip video</text:p>
      <text:p text:style-name="P38">Video sizes</text:p>
      <text:p text:style-name="Normal">9:16 = Reels, Shorts, TikTok</text:p>
      <text:p text:style-name="Normal">1:1 = Facebook/Instagram feed</text:p>
      <text:p text:style-name="Normal">16:9 = YouTube/Facebook landscape</text:p>
      <text:p text:style-name="P39">Video fields</text:p>
      <text:p text:style-name="Normal">Title</text:p>
      <text:p text:style-name="Normal">Subtitle</text:p>
      <text:p text:style-name="Normal">Logo</text:p>
      <text:p text:style-name="Normal">Background image</text:p>
      <text:p text:style-name="Normal">Background video</text:p>
      <text:p text:style-name="Normal">CTA</text:p>
      <text:p text:style-name="Normal">Price</text:p>
      <text:p text:style-name="Normal">Website</text:p>
      <text:p text:style-name="Normal">Phone number</text:p>
      <text:p text:style-name="Normal">Music</text:p>
      <text:p text:style-name="Normal">Voiceover</text:p>
      <text:p text:style-name="Normal">Duration</text:p>
      <text:p text:style-name="Normal">Platform size</text:p>
      <text:p text:style-name="P40">Later premium feature</text:p>
      <text:p text:style-name="Normal">Later you can add:</text:p>
      <text:soft-page-break/>
      <text:p text:style-name="Normal">Full AI video generation</text:p>
      <text:p text:style-name="Normal">Avatar videos</text:p>
      <text:p text:style-name="Normal">AI voiceover</text:p>
      <text:p text:style-name="Normal">AI generated music</text:p>
      <text:p text:style-name="Normal">But keep those as paid credits.</text:p>
      <text:p text:style-name="Normal"><draw:custom-shape svg:x="0in" svg:y="0in" svg:width="45.51042in" svg:height="0.00139in" draw:z-index="0" draw:id="id16" draw:style-name="a16" draw:name="Horizontal Line 257" text:anchor-type="as-char"><svg:title/><svg:desc/><draw:enhanced-geometry draw:type="non-primitive" svg:viewBox="0 0 21600 21600" draw:enhanced-path="M 0 0 L 21600 0 21600 21600 0 21600 Z N"/></draw:custom-shape></text:p>
      <text:p text:style-name="P41">17. Media library</text:p>
      <text:p text:style-name="Normal">Use Cloudinary.</text:p>
      <text:p text:style-name="Normal">Users can upload:</text:p>
      <text:p text:style-name="Normal">Images</text:p>
      <text:p text:style-name="Normal">Logos</text:p>
      <text:p text:style-name="Normal">Videos</text:p>
      <text:p text:style-name="Normal">Audio files</text:p>
      <text:p text:style-name="Normal">Brand assets</text:p>
      <text:p text:style-name="Normal">Product images</text:p>
      <text:p text:style-name="Normal">Template backgrounds</text:p>
      <text:p text:style-name="Normal">Media library features:</text:p>
      <text:p text:style-name="Normal">Upload media</text:p>
      <text:p text:style-name="Normal">Delete media</text:p>
      <text:p text:style-name="Normal">Preview media</text:p>
      <text:p text:style-name="Normal">Search media</text:p>
      <text:p text:style-name="Normal">Filter by type</text:p>
      <text:p text:style-name="Normal">Use media in post</text:p>
      <text:p text:style-name="Normal">Use media in video template</text:p>
      <text:p text:style-name="Normal">Cloudinary optimization</text:p>
      <text:p text:style-name="Normal"><draw:custom-shape svg:x="0in" svg:y="0in" svg:width="45.51042in" svg:height="0.00139in" draw:z-index="0" draw:id="id17" draw:style-name="a17" draw:name="Horizontal Line 258" text:anchor-type="as-char"><svg:title/><svg:desc/><draw:enhanced-geometry draw:type="non-primitive" svg:viewBox="0 0 21600 21600" draw:enhanced-path="M 0 0 L 21600 0 21600 21600 0 21600 Z N"/></draw:custom-shape></text:p>
      <text:p text:style-name="P42">18. Analytics</text:p>
      <text:p text:style-name="Normal">Track:</text:p>
      <text:p text:style-name="Normal">Views</text:p>
      <text:p text:style-name="Normal">Likes</text:p>
      <text:p text:style-name="Normal">Comments</text:p>
      <text:soft-page-break/>
      <text:p text:style-name="Normal">Shares</text:p>
      <text:p text:style-name="Normal">Clicks</text:p>
      <text:p text:style-name="Normal">Reach</text:p>
      <text:p text:style-name="Normal">Engagement rate</text:p>
      <text:p text:style-name="Normal">Post status</text:p>
      <text:p text:style-name="Normal">Best platform</text:p>
      <text:p text:style-name="Normal">Best time</text:p>
      <text:p text:style-name="Normal">Best content type</text:p>
      <text:p text:style-name="Normal">Top performing post</text:p>
      <text:p text:style-name="Normal">Failed posts</text:p>
      <text:p text:style-name="P43">Analytics pages</text:p>
      <text:p text:style-name="Normal">Overview analytics</text:p>
      <text:p text:style-name="Normal">Post analytics</text:p>
      <text:p text:style-name="Normal">Platform analytics</text:p>
      <text:p text:style-name="Normal">Campaign analytics</text:p>
      <text:p text:style-name="Normal">Brand analytics</text:p>
      <text:p text:style-name="Normal">Team performance</text:p>
      <text:p text:style-name="Normal">AI usage analytics</text:p>
      <text:p text:style-name="P44">Smart analytics feature</text:p>
      <text:p text:style-name="Normal">AI should explain analytics in simple English.</text:p>
      <text:p text:style-name="Normal">Example:</text:p>
      <text:p text:style-name="Normal">Your Facebook posts with offers performed better than general awareness posts.</text:p>
      <text:p text:style-name="Normal">Post more offer-based content between 6 PM and 9 PM.</text:p>
      <text:p text:style-name="Normal"><draw:custom-shape svg:x="0in" svg:y="0in" svg:width="45.51042in" svg:height="0.00139in" draw:z-index="0" draw:id="id18" draw:style-name="a18" draw:name="Horizontal Line 259" text:anchor-type="as-char"><svg:title/><svg:desc/><draw:enhanced-geometry draw:type="non-primitive" svg:viewBox="0 0 21600 21600" draw:enhanced-path="M 0 0 L 21600 0 21600 21600 0 21600 Z N"/></draw:custom-shape></text:p>
      <text:p text:style-name="P45">19. Approval workflow</text:p>
      <text:p text:style-name="Normal">Important for agencies.</text:p>
      <text:p text:style-name="Normal">Flow:</text:p>
      <text:p text:style-name="Normal">Content creator creates post</text:p>
      <text:p text:style-name="Normal">Post goes to pending approval</text:p>
      <text:p text:style-name="Normal">Client reviews post</text:p>
      <text:p text:style-name="Normal">Client approves or rejects</text:p>
      <text:soft-page-break/>
      <text:p text:style-name="Normal">Approved post can be scheduled</text:p>
      <text:p text:style-name="Normal">Rejected post returns to draft</text:p>
      <text:p text:style-name="Normal">Features:</text:p>
      <text:p text:style-name="Normal">Approve post</text:p>
      <text:p text:style-name="Normal">Reject post</text:p>
      <text:p text:style-name="Normal">Comment on post</text:p>
      <text:p text:style-name="Normal">Request changes</text:p>
      <text:p text:style-name="Normal">Approval history</text:p>
      <text:p text:style-name="Normal">Client-only login</text:p>
      <text:p text:style-name="Normal"><draw:custom-shape svg:x="0in" svg:y="0in" svg:width="45.51042in" svg:height="0.00139in" draw:z-index="0" draw:id="id19" draw:style-name="a19" draw:name="Horizontal Line 260" text:anchor-type="as-char"><svg:title/><svg:desc/><draw:enhanced-geometry draw:type="non-primitive" svg:viewBox="0 0 21600 21600" draw:enhanced-path="M 0 0 L 21600 0 21600 21600 0 21600 Z N"/></draw:custom-shape></text:p>
      <text:p text:style-name="P46">20. Team features</text:p>
      <text:p text:style-name="Normal">Brand owner can invite team members.</text:p>
      <text:p text:style-name="Normal">Team roles:</text:p>
      <text:p text:style-name="Normal">Admin</text:p>
      <text:p text:style-name="Normal">Manager</text:p>
      <text:p text:style-name="Normal">Content creator</text:p>
      <text:p text:style-name="Normal">Editor</text:p>
      <text:p text:style-name="Normal">Reviewer</text:p>
      <text:p text:style-name="Normal">Viewer</text:p>
      <text:p text:style-name="Normal">Permissions:</text:p>
      <text:p text:style-name="Normal">Can create posts</text:p>
      <text:p text:style-name="Normal">Can edit posts</text:p>
      <text:p text:style-name="Normal">Can delete posts</text:p>
      <text:p text:style-name="Normal">Can publish posts</text:p>
      <text:p text:style-name="Normal">Can schedule posts</text:p>
      <text:p text:style-name="Normal">Can approve posts</text:p>
      <text:p text:style-name="Normal">Can manage billing</text:p>
      <text:p text:style-name="Normal">Can manage team</text:p>
      <text:p text:style-name="Normal">Can view analytics</text:p>
      <text:p text:style-name="Normal"><draw:custom-shape svg:x="0in" svg:y="0in" svg:width="45.51042in" svg:height="0.00139in" draw:z-index="0" draw:id="id20" draw:style-name="a20" draw:name="Horizontal Line 261" text:anchor-type="as-char"><svg:title/><svg:desc/><draw:enhanced-geometry draw:type="non-primitive" svg:viewBox="0 0 21600 21600" draw:enhanced-path="M 0 0 L 21600 0 21600 21600 0 21600 Z N"/></draw:custom-shape></text:p>
      <text:p text:style-name="P47">21. Admin dashboard</text:p>
      <text:soft-page-break/>
      <text:p text:style-name="Normal">Super admin dashboard should include:</text:p>
      <text:p text:style-name="Normal">Total users</text:p>
      <text:p text:style-name="Normal">Total brands</text:p>
      <text:p text:style-name="Normal">Total posts</text:p>
      <text:p text:style-name="Normal">Scheduled posts</text:p>
      <text:p text:style-name="Normal">Published posts</text:p>
      <text:p text:style-name="Normal">Failed posts</text:p>
      <text:p text:style-name="Normal">API usage</text:p>
      <text:p text:style-name="Normal">AI usage</text:p>
      <text:p text:style-name="Normal">Subscription revenue</text:p>
      <text:p text:style-name="Normal">New signups</text:p>
      <text:p text:style-name="Normal">Active users</text:p>
      <text:p text:style-name="Normal">Connected social accounts</text:p>
      <text:p text:style-name="Normal">System errors</text:p>
      <text:p text:style-name="Normal">Admin pages:</text:p>
      <text:p text:style-name="Normal">Users</text:p>
      <text:p text:style-name="Normal">Brands</text:p>
      <text:p text:style-name="Normal">Posts</text:p>
      <text:p text:style-name="Normal">Subscriptions</text:p>
      <text:p text:style-name="Normal">Payments</text:p>
      <text:p text:style-name="Normal">API Usage</text:p>
      <text:p text:style-name="Normal">AI Usage</text:p>
      <text:p text:style-name="Normal">Failed Posts</text:p>
      <text:p text:style-name="Normal">Reports</text:p>
      <text:p text:style-name="Normal">Templates</text:p>
      <text:p text:style-name="Normal">Social Connections</text:p>
      <text:p text:style-name="Normal">Abuse Reports</text:p>
      <text:p text:style-name="Normal">System Settings</text:p>
      <text:p text:style-name="Normal">Admin actions:</text:p>
      <text:p text:style-name="Normal">View user</text:p>
      <text:p text:style-name="Normal">Suspend user</text:p>
      <text:soft-page-break/>
      <text:p text:style-name="Normal">Activate user</text:p>
      <text:p text:style-name="Normal">Change user plan</text:p>
      <text:p text:style-name="Normal">View brand</text:p>
      <text:p text:style-name="Normal">Delete brand</text:p>
      <text:p text:style-name="Normal">View failed posts</text:p>
      <text:p text:style-name="Normal">Retry failed posts</text:p>
      <text:p text:style-name="Normal">Manage templates</text:p>
      <text:p text:style-name="Normal">Manage platform settings</text:p>
      <text:p text:style-name="Normal"><draw:custom-shape svg:x="0in" svg:y="0in" svg:width="45.51042in" svg:height="0.00139in" draw:z-index="0" draw:id="id21" draw:style-name="a21" draw:name="Horizontal Line 262" text:anchor-type="as-char"><svg:title/><svg:desc/><draw:enhanced-geometry draw:type="non-primitive" svg:viewBox="0 0 21600 21600" draw:enhanced-path="M 0 0 L 21600 0 21600 21600 0 21600 Z N"/></draw:custom-shape></text:p>
      <text:p text:style-name="P48">22. Usage limits</text:p>
      <text:p text:style-name="Normal">This is very important so API costs do not destroy profit.</text:p>
      <text:p text:style-name="Normal">Track:</text:p>
      <text:p text:style-name="Normal">AI text generations</text:p>
      <text:p text:style-name="Normal">AI image generations</text:p>
      <text:p text:style-name="Normal">Template video renders</text:p>
      <text:p text:style-name="Normal">Scheduled posts</text:p>
      <text:p text:style-name="Normal">Connected brands</text:p>
      <text:p text:style-name="Normal">Connected social accounts</text:p>
      <text:p text:style-name="Normal">Team members</text:p>
      <text:p text:style-name="Normal">Storage usage</text:p>
      <text:p text:style-name="Normal">Example plans:</text:p>
      <text:p text:style-name="P49">Free</text:p>
      <text:p text:style-name="Normal">1 brand</text:p>
      <text:p text:style-name="Normal">10 AI text posts/month</text:p>
      <text:p text:style-name="Normal">5 scheduled posts/month</text:p>
      <text:p text:style-name="Normal">No auto-posting or limited auto-posting</text:p>
      <text:p text:style-name="Normal">No videos</text:p>
      <text:p text:style-name="Normal">Manual posting only</text:p>
      <text:p text:style-name="P50">Starter</text:p>
      <text:p text:style-name="Normal">3 brands</text:p>
      <text:p text:style-name="Normal">100 AI text posts/month</text:p>
      <text:soft-page-break/>
      <text:p text:style-name="Normal">30 scheduled posts/month</text:p>
      <text:p text:style-name="Normal">10 template videos/month</text:p>
      <text:p text:style-name="Normal">Facebook posting</text:p>
      <text:p text:style-name="Normal">Basic analytics</text:p>
      <text:p text:style-name="P51">Pro</text:p>
      <text:p text:style-name="Normal">10 brands</text:p>
      <text:p text:style-name="Normal">500 AI text posts/month</text:p>
      <text:p text:style-name="Normal">150 scheduled posts/month</text:p>
      <text:p text:style-name="Normal">50 template videos/month</text:p>
      <text:p text:style-name="Normal">Facebook + Instagram + YouTube</text:p>
      <text:p text:style-name="Normal">Team members</text:p>
      <text:p text:style-name="Normal">Approval workflow</text:p>
      <text:p text:style-name="Normal">Analytics</text:p>
      <text:p text:style-name="P52">Agency</text:p>
      <text:p text:style-name="Normal">Unlimited or high-limit brands</text:p>
      <text:p text:style-name="Normal">More AI credits</text:p>
      <text:p text:style-name="Normal">More video credits</text:p>
      <text:p text:style-name="Normal">Client approval</text:p>
      <text:p text:style-name="Normal">White-label reports</text:p>
      <text:p text:style-name="Normal">Advanced analytics</text:p>
      <text:p text:style-name="Normal">Priority queue</text:p>
      <text:p text:style-name="Normal"><draw:custom-shape svg:x="0in" svg:y="0in" svg:width="45.51042in" svg:height="0.00139in" draw:z-index="0" draw:id="id22" draw:style-name="a22" draw:name="Horizontal Line 263" text:anchor-type="as-char"><svg:title/><svg:desc/><draw:enhanced-geometry draw:type="non-primitive" svg:viewBox="0 0 21600 21600" draw:enhanced-path="M 0 0 L 21600 0 21600 21600 0 21600 Z N"/></draw:custom-shape></text:p>
      <text:p text:style-name="P53">23. Billing and payments</text:p>
      <text:p text:style-name="Normal">Add later, but include structure now.</text:p>
      <text:p text:style-name="Normal">Payment providers:</text:p>
      <text:p text:style-name="Normal">Stripe</text:p>
      <text:p text:style-name="Normal">Flutterwave</text:p>
      <text:p text:style-name="Normal">Paystack</text:p>
      <text:p text:style-name="Normal">Mobile Money later</text:p>
      <text:p text:style-name="Normal">Billing features:</text:p>
      <text:p text:style-name="Normal">Subscription plans</text:p>
      <text:soft-page-break/>
      <text:p text:style-name="Normal">Monthly billing</text:p>
      <text:p text:style-name="Normal">Yearly billing</text:p>
      <text:p text:style-name="Normal">Usage credits</text:p>
      <text:p text:style-name="Normal">AI credits</text:p>
      <text:p text:style-name="Normal">Video credits</text:p>
      <text:p text:style-name="Normal">Payment history</text:p>
      <text:p text:style-name="Normal">Invoices</text:p>
      <text:p text:style-name="Normal">Upgrade plan</text:p>
      <text:p text:style-name="Normal">Downgrade plan</text:p>
      <text:p text:style-name="Normal">Cancel plan</text:p>
      <text:p text:style-name="Normal"><draw:custom-shape svg:x="0in" svg:y="0in" svg:width="45.51042in" svg:height="0.00139in" draw:z-index="0" draw:id="id23" draw:style-name="a23" draw:name="Horizontal Line 264" text:anchor-type="as-char"><svg:title/><svg:desc/><draw:enhanced-geometry draw:type="non-primitive" svg:viewBox="0 0 21600 21600" draw:enhanced-path="M 0 0 L 21600 0 21600 21600 0 21600 Z N"/></draw:custom-shape></text:p>
      <text:p text:style-name="P54">24. Notifications</text:p>
      <text:p text:style-name="Normal">Notify users when:</text:p>
      <text:p text:style-name="Normal">Post is published</text:p>
      <text:p text:style-name="Normal">Post fails</text:p>
      <text:p text:style-name="Normal">Post needs approval</text:p>
      <text:p text:style-name="Normal">Post is approved</text:p>
      <text:p text:style-name="Normal">Post is rejected</text:p>
      <text:p text:style-name="Normal">Social account token expires</text:p>
      <text:p text:style-name="Normal">AI usage limit is almost finished</text:p>
      <text:p text:style-name="Normal">Subscription expires</text:p>
      <text:p text:style-name="Normal">Payment fails</text:p>
      <text:p text:style-name="Normal">Campaign starts</text:p>
      <text:p text:style-name="Normal">Campaign ends</text:p>
      <text:p text:style-name="Normal">Notification channels:</text:p>
      <text:p text:style-name="Normal">In-app notifications</text:p>
      <text:p text:style-name="Normal">Email notifications</text:p>
      <text:p text:style-name="Normal">WhatsApp notifications later</text:p>
      <text:p text:style-name="Normal"><draw:custom-shape svg:x="0in" svg:y="0in" svg:width="45.51042in" svg:height="0.00139in" draw:z-index="0" draw:id="id24" draw:style-name="a24" draw:name="Horizontal Line 265" text:anchor-type="as-char"><svg:title/><svg:desc/><draw:enhanced-geometry draw:type="non-primitive" svg:viewBox="0 0 21600 21600" draw:enhanced-path="M 0 0 L 21600 0 21600 21600 0 21600 Z N"/></draw:custom-shape></text:p>
      <text:p text:style-name="P55">25. Security features</text:p>
      <text:p text:style-name="Normal">Include:</text:p>
      <text:soft-page-break/>
      <text:p text:style-name="Normal">Password hashing</text:p>
      <text:p text:style-name="Normal">Google OAuth</text:p>
      <text:p text:style-name="Normal">Protected routes</text:p>
      <text:p text:style-name="Normal">Role permissions</text:p>
      <text:p text:style-name="Normal">CSRF protection</text:p>
      <text:p text:style-name="Normal">Rate limiting</text:p>
      <text:p text:style-name="Normal">Input validation</text:p>
      <text:p text:style-name="Normal">File upload validation</text:p>
      <text:p text:style-name="Normal">Token encryption</text:p>
      <text:p text:style-name="Normal">API key protection</text:p>
      <text:p text:style-name="Normal">Session timeout</text:p>
      <text:p text:style-name="Normal">Audit logs</text:p>
      <text:p text:style-name="P56">Important security rule</text:p>
      <text:p text:style-name="Normal">Do not store social media passwords.</text:p>
      <text:p text:style-name="Normal">Only store:</text:p>
      <text:p text:style-name="Normal">OAuth access tokens</text:p>
      <text:p text:style-name="Normal">Refresh tokens</text:p>
      <text:p text:style-name="Normal">Permissions</text:p>
      <text:p text:style-name="Normal">Expiry dates</text:p>
      <text:p text:style-name="Normal"><draw:custom-shape svg:x="0in" svg:y="0in" svg:width="45.51042in" svg:height="0.00139in" draw:z-index="0" draw:id="id25" draw:style-name="a25" draw:name="Horizontal Line 266" text:anchor-type="as-char"><svg:title/><svg:desc/><draw:enhanced-geometry draw:type="non-primitive" svg:viewBox="0 0 21600 21600" draw:enhanced-path="M 0 0 L 21600 0 21600 21600 0 21600 Z N"/></draw:custom-shape></text:p>
      <text:p text:style-name="P57">26. Audit logs</text:p>
      <text:p text:style-name="Normal">Track important actions:</text:p>
      <text:p text:style-name="Normal">User login</text:p>
      <text:p text:style-name="Normal">User logout</text:p>
      <text:p text:style-name="Normal">Brand created</text:p>
      <text:p text:style-name="Normal">Brand updated</text:p>
      <text:p text:style-name="Normal">Post created</text:p>
      <text:p text:style-name="Normal">Post edited</text:p>
      <text:p text:style-name="Normal">Post scheduled</text:p>
      <text:p text:style-name="Normal">Post published</text:p>
      <text:p text:style-name="Normal">Post failed</text:p>
      <text:soft-page-break/>
      <text:p text:style-name="Normal">Social account connected</text:p>
      <text:p text:style-name="Normal">Social account disconnected</text:p>
      <text:p text:style-name="Normal">Payment made</text:p>
      <text:p text:style-name="Normal">Plan changed</text:p>
      <text:p text:style-name="Normal">Team member added</text:p>
      <text:p text:style-name="Normal">Team member removed</text:p>
      <text:p text:style-name="Normal">Audit fields:</text:p>
      <text:p text:style-name="Normal">User</text:p>
      <text:p text:style-name="Normal">Action</text:p>
      <text:p text:style-name="Normal">Entity type</text:p>
      <text:p text:style-name="Normal">Entity ID</text:p>
      <text:p text:style-name="Normal">IP address</text:p>
      <text:p text:style-name="Normal">User agent</text:p>
      <text:p text:style-name="Normal">Date</text:p>
      <text:p text:style-name="Normal"><draw:custom-shape svg:x="0in" svg:y="0in" svg:width="45.51042in" svg:height="0.00139in" draw:z-index="0" draw:id="id26" draw:style-name="a26" draw:name="Horizontal Line 267" text:anchor-type="as-char"><svg:title/><svg:desc/><draw:enhanced-geometry draw:type="non-primitive" svg:viewBox="0 0 21600 21600" draw:enhanced-path="M 0 0 L 21600 0 21600 21600 0 21600 Z N"/></draw:custom-shape></text:p>
      <text:p text:style-name="P58">27. Error handling</text:p>
      <text:p text:style-name="Normal">Every failed post should save:</text:p>
      <text:p text:style-name="Normal">Post ID</text:p>
      <text:p text:style-name="Normal">Platform</text:p>
      <text:p text:style-name="Normal">Error message</text:p>
      <text:p text:style-name="Normal">Error code</text:p>
      <text:p text:style-name="Normal">Retry count</text:p>
      <text:p text:style-name="Normal">Last retry date</text:p>
      <text:p text:style-name="Normal">Status</text:p>
      <text:p text:style-name="Normal">Suggested fix</text:p>
      <text:p text:style-name="Normal">Failed post actions:</text:p>
      <text:p text:style-name="Normal">Retry now</text:p>
      <text:p text:style-name="Normal">Edit and retry</text:p>
      <text:p text:style-name="Normal">Cancel post</text:p>
      <text:p text:style-name="Normal">Duplicate post</text:p>
      <text:p text:style-name="Normal">View error</text:p>
      <text:soft-page-break/>
      <text:p text:style-name="Normal">Reconnect account</text:p>
      <text:p text:style-name="Normal"><draw:custom-shape svg:x="0in" svg:y="0in" svg:width="45.51042in" svg:height="0.00139in" draw:z-index="0" draw:id="id27" draw:style-name="a27" draw:name="Horizontal Line 268" text:anchor-type="as-char"><svg:title/><svg:desc/><draw:enhanced-geometry draw:type="non-primitive" svg:viewBox="0 0 21600 21600" draw:enhanced-path="M 0 0 L 21600 0 21600 21600 0 21600 Z N"/></draw:custom-shape></text:p>
      <text:p text:style-name="P59">28. Database models</text:p>
      <text:p text:style-name="Normal">Use these Mongoose models:</text:p>
      <text:p text:style-name="Normal">User</text:p>
      <text:p text:style-name="Normal">Brand</text:p>
      <text:p text:style-name="Normal">SocialAccount</text:p>
      <text:p text:style-name="Normal">Post</text:p>
      <text:p text:style-name="Normal">Campaign</text:p>
      <text:p text:style-name="Normal">Media</text:p>
      <text:p text:style-name="Normal">VideoTemplate</text:p>
      <text:p text:style-name="Normal">Analytics</text:p>
      <text:p text:style-name="Normal">Subscription</text:p>
      <text:p text:style-name="Normal">UsageLog</text:p>
      <text:p text:style-name="Normal">Notification</text:p>
      <text:p text:style-name="Normal">TeamMember</text:p>
      <text:p text:style-name="Normal">Approval</text:p>
      <text:p text:style-name="Normal">AuditLog</text:p>
      <text:p text:style-name="Normal">ApiLog</text:p>
      <text:p text:style-name="Normal">Payment</text:p>
      <text:p text:style-name="Normal"><draw:custom-shape svg:x="0in" svg:y="0in" svg:width="45.51042in" svg:height="0.00139in" draw:z-index="0" draw:id="id28" draw:style-name="a28" draw:name="Horizontal Line 269" text:anchor-type="as-char"><svg:title/><svg:desc/><draw:enhanced-geometry draw:type="non-primitive" svg:viewBox="0 0 21600 21600" draw:enhanced-path="M 0 0 L 21600 0 21600 21600 0 21600 Z N"/></draw:custom-shape></text:p>
      <text:p text:style-name="P60">29. Final folder structure</text:p>
      <text:p text:style-name="Normal">Use your style with clean filenames.</text:p>
      <text:p text:style-name="Normal">autobrand-ai/</text:p>
      <text:p text:style-name="Normal">│</text:p>
      <text:p text:style-name="Normal"><text:span text:style-name="T61">├</text:span><text:span text:style-name="T62">──</text:span><text:s/>app.js</text:p>
      <text:p text:style-name="Normal"><text:span text:style-name="T63">├</text:span><text:span text:style-name="T64">──</text:span><text:s/>server.js</text:p>
      <text:p text:style-name="Normal"><text:span text:style-name="T65">├</text:span><text:span text:style-name="T66">──</text:span><text:s/>package.json</text:p>
      <text:p text:style-name="Normal"><text:span text:style-name="T67">├</text:span><text:span text:style-name="T68">──</text:span><text:s/>.env</text:p>
      <text:p text:style-name="Normal">│</text:p>
      <text:p text:style-name="Normal"><text:span text:style-name="T69">├</text:span><text:span text:style-name="T70">──</text:span><text:s/>config/</text:p>
      <text:soft-page-break/>
      <text:p text:style-name="Normal">│ <text:s text:c="2"/><text:span text:style-name="T71">├</text:span><text:span text:style-name="T72">──</text:span><text:s/>db.js</text:p>
      <text:p text:style-name="Normal">│ <text:s text:c="2"/><text:span text:style-name="T73">├</text:span><text:span text:style-name="T74">──</text:span><text:s/>cloudinary.js</text:p>
      <text:p text:style-name="Normal">│ <text:s text:c="2"/><text:span text:style-name="T75">├</text:span><text:span text:style-name="T76">──</text:span><text:s/>passport.js</text:p>
      <text:p text:style-name="Normal">│ <text:s text:c="2"/><text:span text:style-name="T77">├</text:span><text:span text:style-name="T78">──</text:span><text:s/>openai.js</text:p>
      <text:p text:style-name="Normal">│ <text:s text:c="2"/><text:span text:style-name="T79">├</text:span><text:span text:style-name="T80">──</text:span><text:s/>queue.js</text:p>
      <text:p text:style-name="Normal">│ <text:s text:c="2"/>└── session.js</text:p>
      <text:p text:style-name="Normal">│</text:p>
      <text:p text:style-name="Normal"><text:span text:style-name="T81">├</text:span><text:span text:style-name="T82">──</text:span><text:s/>controllers/</text:p>
      <text:p text:style-name="Normal">│ <text:s text:c="2"/><text:span text:style-name="T83">├</text:span><text:span text:style-name="T84">──</text:span><text:s/>auth.js</text:p>
      <text:p text:style-name="Normal">│ <text:s text:c="2"/><text:span text:style-name="T85">├</text:span><text:span text:style-name="T86">──</text:span><text:s/>public.js</text:p>
      <text:p text:style-name="Normal">│ <text:s text:c="2"/><text:span text:style-name="T87">├</text:span><text:span text:style-name="T88">──</text:span><text:s/>dashboard.js</text:p>
      <text:p text:style-name="Normal">│ <text:s text:c="2"/><text:span text:style-name="T89">├</text:span><text:span text:style-name="T90">──</text:span><text:s/>brand.js</text:p>
      <text:p text:style-name="Normal">│ <text:s text:c="2"/><text:span text:style-name="T91">├</text:span><text:span text:style-name="T92">──</text:span><text:s/>post.js</text:p>
      <text:p text:style-name="Normal">│ <text:s text:c="2"/><text:span text:style-name="T93">├</text:span><text:span text:style-name="T94">──</text:span><text:s/>ai.js</text:p>
      <text:p text:style-name="Normal">│ <text:s text:c="2"/><text:span text:style-name="T95">├</text:span><text:span text:style-name="T96">──</text:span><text:s/>campaign.js</text:p>
      <text:p text:style-name="Normal">│ <text:s text:c="2"/><text:span text:style-name="T97">├</text:span><text:span text:style-name="T98">──</text:span><text:s/>calendar.js</text:p>
      <text:p text:style-name="Normal">│ <text:s text:c="2"/><text:span text:style-name="T99">├</text:span><text:span text:style-name="T100">──</text:span><text:s/>media.js</text:p>
      <text:p text:style-name="Normal">│ <text:s text:c="2"/><text:span text:style-name="T101">├</text:span><text:span text:style-name="T102">──</text:span><text:s/>template.js</text:p>
      <text:p text:style-name="Normal">│ <text:s text:c="2"/><text:span text:style-name="T103">├</text:span><text:span text:style-name="T104">──</text:span><text:s/>social.js</text:p>
      <text:p text:style-name="Normal">│ <text:s text:c="2"/><text:span text:style-name="T105">├</text:span><text:span text:style-name="T106">──</text:span><text:s/>analytics.js</text:p>
      <text:p text:style-name="Normal">│ <text:s text:c="2"/><text:span text:style-name="T107">├</text:span><text:span text:style-name="T108">──</text:span><text:s/>approval.js</text:p>
      <text:p text:style-name="Normal">│ <text:s text:c="2"/><text:span text:style-name="T109">├</text:span><text:span text:style-name="T110">──</text:span><text:s/>team.js</text:p>
      <text:p text:style-name="Normal">│ <text:s text:c="2"/><text:span text:style-name="T111">├</text:span><text:span text:style-name="T112">──</text:span><text:s/>billing.js</text:p>
      <text:p text:style-name="Normal">│ <text:s text:c="2"/><text:span text:style-name="T113">├</text:span><text:span text:style-name="T114">──</text:span><text:s/>notification.js</text:p>
      <text:p text:style-name="Normal">│ <text:s text:c="2"/>└── admin.js</text:p>
      <text:p text:style-name="Normal">│</text:p>
      <text:p text:style-name="Normal"><text:span text:style-name="T115">├</text:span><text:span text:style-name="T116">──</text:span><text:s/>models/</text:p>
      <text:p text:style-name="Normal">│ <text:s text:c="2"/><text:span text:style-name="T117">├</text:span><text:span text:style-name="T118">──</text:span><text:s/>User.js</text:p>
      <text:p text:style-name="Normal">│ <text:s text:c="2"/><text:span text:style-name="T119">├</text:span><text:span text:style-name="T120">──</text:span><text:s/>Brand.js</text:p>
      <text:p text:style-name="Normal">│ <text:s text:c="2"/><text:span text:style-name="T121">├</text:span><text:span text:style-name="T122">──</text:span><text:s/>SocialAccount.js</text:p>
      <text:soft-page-break/>
      <text:p text:style-name="Normal">│ <text:s text:c="2"/><text:span text:style-name="T123">├</text:span><text:span text:style-name="T124">──</text:span><text:s/>Post.js</text:p>
      <text:p text:style-name="Normal">│ <text:s text:c="2"/><text:span text:style-name="T125">├</text:span><text:span text:style-name="T126">──</text:span><text:s/>Campaign.js</text:p>
      <text:p text:style-name="Normal">│ <text:s text:c="2"/><text:span text:style-name="T127">├</text:span><text:span text:style-name="T128">──</text:span><text:s/>Media.js</text:p>
      <text:p text:style-name="Normal">│ <text:s text:c="2"/><text:span text:style-name="T129">├</text:span><text:span text:style-name="T130">──</text:span><text:s/>VideoTemplate.js</text:p>
      <text:p text:style-name="Normal">│ <text:s text:c="2"/><text:span text:style-name="T131">├</text:span><text:span text:style-name="T132">──</text:span><text:s/>Analytics.js</text:p>
      <text:p text:style-name="Normal">│ <text:s text:c="2"/><text:span text:style-name="T133">├</text:span><text:span text:style-name="T134">──</text:span><text:s/>Subscription.js</text:p>
      <text:p text:style-name="Normal">│ <text:s text:c="2"/><text:span text:style-name="T135">├</text:span><text:span text:style-name="T136">──</text:span><text:s/>UsageLog.js</text:p>
      <text:p text:style-name="Normal">│ <text:s text:c="2"/><text:span text:style-name="T137">├</text:span><text:span text:style-name="T138">──</text:span><text:s/>Notification.js</text:p>
      <text:p text:style-name="Normal">│ <text:s text:c="2"/><text:span text:style-name="T139">├</text:span><text:span text:style-name="T140">──</text:span><text:s/>TeamMember.js</text:p>
      <text:p text:style-name="Normal">│ <text:s text:c="2"/><text:span text:style-name="T141">├</text:span><text:span text:style-name="T142">──</text:span><text:s/>Approval.js</text:p>
      <text:p text:style-name="Normal">│ <text:s text:c="2"/><text:span text:style-name="T143">├</text:span><text:span text:style-name="T144">──</text:span><text:s/>AuditLog.js</text:p>
      <text:p text:style-name="Normal">│ <text:s text:c="2"/><text:span text:style-name="T145">├</text:span><text:span text:style-name="T146">──</text:span><text:s/>ApiLog.js</text:p>
      <text:p text:style-name="Normal">│ <text:s text:c="2"/>└── Payment.js</text:p>
      <text:p text:style-name="Normal">│</text:p>
      <text:p text:style-name="Normal"><text:span text:style-name="T147">├</text:span><text:span text:style-name="T148">──</text:span><text:s/>middlewares/</text:p>
      <text:p text:style-name="Normal">│ <text:s text:c="2"/><text:span text:style-name="T149">├</text:span><text:span text:style-name="T150">──</text:span><text:s/>auth.js</text:p>
      <text:p text:style-name="Normal">│ <text:s text:c="2"/><text:span text:style-name="T151">├</text:span><text:span text:style-name="T152">──</text:span><text:s/>guest.js</text:p>
      <text:p text:style-name="Normal">│ <text:s text:c="2"/><text:span text:style-name="T153">├</text:span><text:span text:style-name="T154">──</text:span><text:s/>role.js</text:p>
      <text:p text:style-name="Normal">│ <text:s text:c="2"/><text:span text:style-name="T155">├</text:span><text:span text:style-name="T156">──</text:span><text:s/>upload.js</text:p>
      <text:p text:style-name="Normal">│ <text:s text:c="2"/><text:span text:style-name="T157">├</text:span><text:span text:style-name="T158">──</text:span><text:s/>usageLimit.js</text:p>
      <text:p text:style-name="Normal">│ <text:s text:c="2"/><text:span text:style-name="T159">├</text:span><text:span text:style-name="T160">──</text:span><text:s/>validate.js</text:p>
      <text:p text:style-name="Normal">│ <text:s text:c="2"/>└── errorHandler.js</text:p>
      <text:p text:style-name="Normal">│</text:p>
      <text:p text:style-name="Normal"><text:span text:style-name="T161">├</text:span><text:span text:style-name="T162">──</text:span><text:s/>services/</text:p>
      <text:p text:style-name="Normal">│ <text:s text:c="2"/><text:span text:style-name="T163">├</text:span><text:span text:style-name="T164">──</text:span><text:s/>openaiService.js</text:p>
      <text:p text:style-name="Normal">│ <text:s text:c="2"/><text:span text:style-name="T165">├</text:span><text:span text:style-name="T166">──</text:span><text:s/>facebookService.js</text:p>
      <text:p text:style-name="Normal">│ <text:s text:c="2"/><text:span text:style-name="T167">├</text:span><text:span text:style-name="T168">──</text:span><text:s/>instagramService.js</text:p>
      <text:p text:style-name="Normal">│ <text:s text:c="2"/><text:span text:style-name="T169">├</text:span><text:span text:style-name="T170">──</text:span><text:s/>youtubeService.js</text:p>
      <text:p text:style-name="Normal">│ <text:s text:c="2"/><text:span text:style-name="T171">├</text:span><text:span text:style-name="T172">──</text:span><text:s/>linkedinService.js</text:p>
      <text:p text:style-name="Normal">│ <text:s text:c="2"/><text:span text:style-name="T173">├</text:span><text:span text:style-name="T174">──</text:span><text:s/>cloudinaryService.js</text:p>
      <text:soft-page-break/>
      <text:p text:style-name="Normal">│ <text:s text:c="2"/><text:span text:style-name="T175">├</text:span><text:span text:style-name="T176">──</text:span><text:s/>videoTemplateService.js</text:p>
      <text:p text:style-name="Normal">│ <text:s text:c="2"/><text:span text:style-name="T177">├</text:span><text:span text:style-name="T178">──</text:span><text:s/>schedulerService.js</text:p>
      <text:p text:style-name="Normal">│ <text:s text:c="2"/><text:span text:style-name="T179">├</text:span><text:span text:style-name="T180">──</text:span><text:s/>analyticsService.js</text:p>
      <text:p text:style-name="Normal">│ <text:s text:c="2"/><text:span text:style-name="T181">├</text:span><text:span text:style-name="T182">──</text:span><text:s/>billingService.js</text:p>
      <text:p text:style-name="Normal">│ <text:s text:c="2"/>└── notificationService.js</text:p>
      <text:p text:style-name="Normal">│</text:p>
      <text:p text:style-name="Normal"><text:span text:style-name="T183">├</text:span><text:span text:style-name="T184">──</text:span><text:s/>workers/</text:p>
      <text:p text:style-name="Normal">│ <text:s text:c="2"/><text:span text:style-name="T185">├</text:span><text:span text:style-name="T186">──</text:span><text:s/>postWorker.js</text:p>
      <text:p text:style-name="Normal">│ <text:s text:c="2"/><text:span text:style-name="T187">├</text:span><text:span text:style-name="T188">──</text:span><text:s/>analyticsWorker.js</text:p>
      <text:p text:style-name="Normal">│ <text:s text:c="2"/><text:span text:style-name="T189">├</text:span><text:span text:style-name="T190">──</text:span><text:s/>videoWorker.js</text:p>
      <text:p text:style-name="Normal">│ <text:s text:c="2"/>└── notificationWorker.js</text:p>
      <text:p text:style-name="Normal">│</text:p>
      <text:p text:style-name="Normal"><text:span text:style-name="T191">├</text:span><text:span text:style-name="T192">──</text:span><text:s/>routes/</text:p>
      <text:p text:style-name="Normal">│ <text:s text:c="2"/><text:span text:style-name="T193">├</text:span><text:span text:style-name="T194">──</text:span><text:s/>auth.js</text:p>
      <text:p text:style-name="Normal">│ <text:s text:c="2"/><text:span text:style-name="T195">├</text:span><text:span text:style-name="T196">──</text:span><text:s/>public.js</text:p>
      <text:p text:style-name="Normal">│ <text:s text:c="2"/><text:span text:style-name="T197">├</text:span><text:span text:style-name="T198">──</text:span><text:s/>dashboard.js</text:p>
      <text:p text:style-name="Normal">│ <text:s text:c="2"/><text:span text:style-name="T199">├</text:span><text:span text:style-name="T200">──</text:span><text:s/>brand.js</text:p>
      <text:p text:style-name="Normal">│ <text:s text:c="2"/><text:span text:style-name="T201">├</text:span><text:span text:style-name="T202">──</text:span><text:s/>post.js</text:p>
      <text:p text:style-name="Normal">│ <text:s text:c="2"/><text:span text:style-name="T203">├</text:span><text:span text:style-name="T204">──</text:span><text:s/>ai.js</text:p>
      <text:p text:style-name="Normal">│ <text:s text:c="2"/><text:span text:style-name="T205">├</text:span><text:span text:style-name="T206">──</text:span><text:s/>campaign.js</text:p>
      <text:p text:style-name="Normal">│ <text:s text:c="2"/><text:span text:style-name="T207">├</text:span><text:span text:style-name="T208">──</text:span><text:s/>calendar.js</text:p>
      <text:p text:style-name="Normal">│ <text:s text:c="2"/><text:span text:style-name="T209">├</text:span><text:span text:style-name="T210">──</text:span><text:s/>media.js</text:p>
      <text:p text:style-name="Normal">│ <text:s text:c="2"/><text:span text:style-name="T211">├</text:span><text:span text:style-name="T212">──</text:span><text:s/>template.js</text:p>
      <text:p text:style-name="Normal">│ <text:s text:c="2"/><text:span text:style-name="T213">├</text:span><text:span text:style-name="T214">──</text:span><text:s/>social.js</text:p>
      <text:p text:style-name="Normal">│ <text:s text:c="2"/><text:span text:style-name="T215">├</text:span><text:span text:style-name="T216">──</text:span><text:s/>analytics.js</text:p>
      <text:p text:style-name="Normal">│ <text:s text:c="2"/><text:span text:style-name="T217">├</text:span><text:span text:style-name="T218">──</text:span><text:s/>approval.js</text:p>
      <text:p text:style-name="Normal">│ <text:s text:c="2"/><text:span text:style-name="T219">├</text:span><text:span text:style-name="T220">──</text:span><text:s/>team.js</text:p>
      <text:p text:style-name="Normal">│ <text:s text:c="2"/><text:span text:style-name="T221">├</text:span><text:span text:style-name="T222">──</text:span><text:s/>billing.js</text:p>
      <text:p text:style-name="Normal">│ <text:s text:c="2"/>└── admin.js</text:p>
      <text:p text:style-name="Normal">│</text:p>
      <text:soft-page-break/>
      <text:p text:style-name="Normal"><text:span text:style-name="T223">├</text:span><text:span text:style-name="T224">──</text:span><text:s/>public/</text:p>
      <text:p text:style-name="Normal">│ <text:s text:c="2"/><text:span text:style-name="T225">├</text:span><text:span text:style-name="T226">──</text:span><text:s/>css/</text:p>
      <text:p text:style-name="Normal">│ <text:s text:c="2"/>│ <text:s text:c="2"/><text:span text:style-name="T227">├</text:span><text:span text:style-name="T228">──</text:span><text:s/>main.css</text:p>
      <text:p text:style-name="Normal">│ <text:s text:c="2"/>│ <text:s text:c="2"/><text:span text:style-name="T229">├</text:span><text:span text:style-name="T230">──</text:span><text:s/>auth.css</text:p>
      <text:p text:style-name="Normal">│ <text:s text:c="2"/>│ <text:s text:c="2"/><text:span text:style-name="T231">├</text:span><text:span text:style-name="T232">──</text:span><text:s/>dashboard.css</text:p>
      <text:p text:style-name="Normal">│ <text:s text:c="2"/>│ <text:s text:c="2"/><text:span text:style-name="T233">├</text:span><text:span text:style-name="T234">──</text:span><text:s/>calendar.css</text:p>
      <text:p text:style-name="Normal">│ <text:s text:c="2"/>│ <text:s text:c="2"/>└── admin.css</text:p>
      <text:p text:style-name="Normal">│ <text:s text:c="2"/>│</text:p>
      <text:p text:style-name="Normal">│ <text:s text:c="2"/><text:span text:style-name="T235">├</text:span><text:span text:style-name="T236">──</text:span><text:s/>js/</text:p>
      <text:p text:style-name="Normal">│ <text:s text:c="2"/>│ <text:s text:c="2"/><text:span text:style-name="T237">├</text:span><text:span text:style-name="T238">──</text:span><text:s/>public.js</text:p>
      <text:p text:style-name="Normal">│ <text:s text:c="2"/>│ <text:s text:c="2"/><text:span text:style-name="T239">├</text:span><text:span text:style-name="T240">──</text:span><text:s/>auth.js</text:p>
      <text:p text:style-name="Normal">│ <text:s text:c="2"/>│ <text:s text:c="2"/><text:span text:style-name="T241">├</text:span><text:span text:style-name="T242">──</text:span><text:s/>dashboard.js</text:p>
      <text:p text:style-name="Normal">│ <text:s text:c="2"/>│ <text:s text:c="2"/><text:span text:style-name="T243">├</text:span><text:span text:style-name="T244">──</text:span><text:s/>ai.js</text:p>
      <text:p text:style-name="Normal">│ <text:s text:c="2"/>│ <text:s text:c="2"/><text:span text:style-name="T245">├</text:span><text:span text:style-name="T246">──</text:span><text:s/>calendar.js</text:p>
      <text:p text:style-name="Normal">│ <text:s text:c="2"/>│ <text:s text:c="2"/><text:span text:style-name="T247">├</text:span><text:span text:style-name="T248">──</text:span><text:s/>post.js</text:p>
      <text:p text:style-name="Normal">│ <text:s text:c="2"/>│ <text:s text:c="2"/><text:span text:style-name="T249">├</text:span><text:span text:style-name="T250">──</text:span><text:s/>media.js</text:p>
      <text:p text:style-name="Normal">│ <text:s text:c="2"/>│ <text:s text:c="2"/><text:span text:style-name="T251">├</text:span><text:span text:style-name="T252">──</text:span><text:s/>modal.js</text:p>
      <text:p text:style-name="Normal">│ <text:s text:c="2"/>│ <text:s text:c="2"/>└── admin.js</text:p>
      <text:p text:style-name="Normal">│ <text:s text:c="2"/>│</text:p>
      <text:p text:style-name="Normal">│ <text:s text:c="2"/><text:span text:style-name="T253">├</text:span><text:span text:style-name="T254">──</text:span><text:s/>images/</text:p>
      <text:p text:style-name="Normal">│ <text:s text:c="2"/>└── uploads/</text:p>
      <text:p text:style-name="Normal">│</text:p>
      <text:p text:style-name="Normal"><text:span text:style-name="T255">├</text:span><text:span text:style-name="T256">──</text:span><text:s/>views/</text:p>
      <text:p text:style-name="Normal">│ <text:s text:c="2"/><text:span text:style-name="T257">├</text:span><text:span text:style-name="T258">──</text:span><text:s/>layouts/</text:p>
      <text:p text:style-name="Normal">│ <text:s text:c="2"/>│ <text:s text:c="2"/><text:span text:style-name="T259">├</text:span><text:span text:style-name="T260">──</text:span><text:s/>main.ejs</text:p>
      <text:p text:style-name="Normal">│ <text:s text:c="2"/>│ <text:s text:c="2"/><text:span text:style-name="T261">├</text:span><text:span text:style-name="T262">──</text:span><text:s/>dashboard.ejs</text:p>
      <text:p text:style-name="Normal">│ <text:s text:c="2"/>│ <text:s text:c="2"/>└── admin.ejs</text:p>
      <text:p text:style-name="Normal">│ <text:s text:c="2"/>│</text:p>
      <text:p text:style-name="Normal">│ <text:s text:c="2"/><text:span text:style-name="T263">├</text:span><text:span text:style-name="T264">──</text:span><text:s/>partials/</text:p>
      <text:p text:style-name="Normal">│ <text:s text:c="2"/>│ <text:s text:c="2"/><text:span text:style-name="T265">├</text:span><text:span text:style-name="T266">──</text:span><text:s/>navbar.ejs</text:p>
      <text:soft-page-break/>
      <text:p text:style-name="Normal">│ <text:s text:c="2"/>│ <text:s text:c="2"/><text:span text:style-name="T267">├</text:span><text:span text:style-name="T268">──</text:span><text:s/>sidebar.ejs</text:p>
      <text:p text:style-name="Normal">│ <text:s text:c="2"/>│ <text:s text:c="2"/><text:span text:style-name="T269">├</text:span><text:span text:style-name="T270">──</text:span><text:s/>footer.ejs</text:p>
      <text:p text:style-name="Normal">│ <text:s text:c="2"/>│ <text:s text:c="2"/><text:span text:style-name="T271">├</text:span><text:span text:style-name="T272">──</text:span><text:s/>flash.ejs</text:p>
      <text:p text:style-name="Normal">│ <text:s text:c="2"/>│ <text:s text:c="2"/><text:span text:style-name="T273">├</text:span><text:span text:style-name="T274">──</text:span><text:s/>modals.ejs</text:p>
      <text:p text:style-name="Normal">│ <text:s text:c="2"/>│ <text:s text:c="2"/>└── pagination.ejs</text:p>
      <text:p text:style-name="Normal">│ <text:s text:c="2"/>│</text:p>
      <text:p text:style-name="Normal">│ <text:s text:c="2"/><text:span text:style-name="T275">├</text:span><text:span text:style-name="T276">──</text:span><text:s/>pages/</text:p>
      <text:p text:style-name="Normal">│ <text:s text:c="2"/>│ <text:s text:c="2"/><text:span text:style-name="T277">├</text:span><text:span text:style-name="T278">──</text:span><text:s/>home.ejs</text:p>
      <text:p text:style-name="Normal">│ <text:s text:c="2"/>│ <text:s text:c="2"/><text:span text:style-name="T279">├</text:span><text:span text:style-name="T280">──</text:span><text:s/>features.ejs</text:p>
      <text:p text:style-name="Normal">│ <text:s text:c="2"/>│ <text:s text:c="2"/><text:span text:style-name="T281">├</text:span><text:span text:style-name="T282">──</text:span><text:s/>pricing.ejs</text:p>
      <text:p text:style-name="Normal">│ <text:s text:c="2"/>│ <text:s text:c="2"/><text:span text:style-name="T283">├</text:span><text:span text:style-name="T284">──</text:span><text:s/>about.ejs</text:p>
      <text:p text:style-name="Normal">│ <text:s text:c="2"/>│ <text:s text:c="2"/><text:span text:style-name="T285">├</text:span><text:span text:style-name="T286">──</text:span><text:s/>contact.ejs</text:p>
      <text:p text:style-name="Normal">│ <text:s text:c="2"/>│ <text:s text:c="2"/><text:span text:style-name="T287">├</text:span><text:span text:style-name="T288">──</text:span><text:s/>terms.ejs</text:p>
      <text:p text:style-name="Normal">│ <text:s text:c="2"/>│ <text:s text:c="2"/>└── privacy.ejs</text:p>
      <text:p text:style-name="Normal">│ <text:s text:c="2"/>│</text:p>
      <text:p text:style-name="Normal">│ <text:s text:c="2"/><text:span text:style-name="T289">├</text:span><text:span text:style-name="T290">──</text:span><text:s/>auth/</text:p>
      <text:p text:style-name="Normal">│ <text:s text:c="2"/>│ <text:s text:c="2"/><text:span text:style-name="T291">├</text:span><text:span text:style-name="T292">──</text:span><text:s/>login.ejs</text:p>
      <text:p text:style-name="Normal">│ <text:s text:c="2"/>│ <text:s text:c="2"/><text:span text:style-name="T293">├</text:span><text:span text:style-name="T294">──</text:span><text:s/>register.ejs</text:p>
      <text:p text:style-name="Normal">│ <text:s text:c="2"/>│ <text:s text:c="2"/><text:span text:style-name="T295">├</text:span><text:span text:style-name="T296">──</text:span><text:s/>forgot.ejs</text:p>
      <text:p text:style-name="Normal">│ <text:s text:c="2"/>│ <text:s text:c="2"/><text:span text:style-name="T297">├</text:span><text:span text:style-name="T298">──</text:span><text:s/>reset.ejs</text:p>
      <text:p text:style-name="Normal">│ <text:s text:c="2"/>│ <text:s text:c="2"/>└── verify.ejs</text:p>
      <text:p text:style-name="Normal">│ <text:s text:c="2"/>│</text:p>
      <text:p text:style-name="Normal">│ <text:s text:c="2"/><text:span text:style-name="T299">├</text:span><text:span text:style-name="T300">──</text:span><text:s/>dashboard/</text:p>
      <text:p text:style-name="Normal">│ <text:s text:c="2"/>│ <text:s text:c="2"/><text:span text:style-name="T301">├</text:span><text:span text:style-name="T302">──</text:span><text:s/>index.ejs</text:p>
      <text:p text:style-name="Normal">│ <text:s text:c="2"/>│ <text:s text:c="2"/><text:span text:style-name="T303">├</text:span><text:span text:style-name="T304">──</text:span><text:s/>brands.ejs</text:p>
      <text:p text:style-name="Normal">│ <text:s text:c="2"/>│ <text:s text:c="2"/><text:span text:style-name="T305">├</text:span><text:span text:style-name="T306">──</text:span><text:s/>brand-profile.ejs</text:p>
      <text:p text:style-name="Normal">│ <text:s text:c="2"/>│ <text:s text:c="2"/><text:span text:style-name="T307">├</text:span><text:span text:style-name="T308">──</text:span><text:s/>ai-generator.ejs</text:p>
      <text:p text:style-name="Normal">│ <text:s text:c="2"/>│ <text:s text:c="2"/><text:span text:style-name="T309">├</text:span><text:span text:style-name="T310">──</text:span><text:s/>campaign-generator.ejs</text:p>
      <text:p text:style-name="Normal">│ <text:s text:c="2"/>│ <text:s text:c="2"/><text:span text:style-name="T311">├</text:span><text:span text:style-name="T312">──</text:span><text:s/>calendar.ejs</text:p>
      <text:p text:style-name="Normal">│ <text:s text:c="2"/>│ <text:s text:c="2"/><text:span text:style-name="T313">├</text:span><text:span text:style-name="T314">──</text:span><text:s/>drafts.ejs</text:p>
      <text:soft-page-break/>
      <text:p text:style-name="Normal">│ <text:s text:c="2"/>│ <text:s text:c="2"/><text:span text:style-name="T315">├</text:span><text:span text:style-name="T316">──</text:span><text:s/>scheduled.ejs</text:p>
      <text:p text:style-name="Normal">│ <text:s text:c="2"/>│ <text:s text:c="2"/><text:span text:style-name="T317">├</text:span><text:span text:style-name="T318">──</text:span><text:s/>published.ejs</text:p>
      <text:p text:style-name="Normal">│ <text:s text:c="2"/>│ <text:s text:c="2"/><text:span text:style-name="T319">├</text:span><text:span text:style-name="T320">──</text:span><text:s/>failed.ejs</text:p>
      <text:p text:style-name="Normal">│ <text:s text:c="2"/>│ <text:s text:c="2"/><text:span text:style-name="T321">├</text:span><text:span text:style-name="T322">──</text:span><text:s/>media.ejs</text:p>
      <text:p text:style-name="Normal">│ <text:s text:c="2"/>│ <text:s text:c="2"/><text:span text:style-name="T323">├</text:span><text:span text:style-name="T324">──</text:span><text:s/>templates.ejs</text:p>
      <text:p text:style-name="Normal">│ <text:s text:c="2"/>│ <text:s text:c="2"/><text:span text:style-name="T325">├</text:span><text:span text:style-name="T326">──</text:span><text:s/>social-accounts.ejs</text:p>
      <text:p text:style-name="Normal">│ <text:s text:c="2"/>│ <text:s text:c="2"/><text:span text:style-name="T327">├</text:span><text:span text:style-name="T328">──</text:span><text:s/>analytics.ejs</text:p>
      <text:p text:style-name="Normal">│ <text:s text:c="2"/>│ <text:s text:c="2"/><text:span text:style-name="T329">├</text:span><text:span text:style-name="T330">──</text:span><text:s/>approvals.ejs</text:p>
      <text:p text:style-name="Normal">│ <text:s text:c="2"/>│ <text:s text:c="2"/><text:span text:style-name="T331">├</text:span><text:span text:style-name="T332">──</text:span><text:s/>team.ejs</text:p>
      <text:p text:style-name="Normal">│ <text:s text:c="2"/>│ <text:s text:c="2"/><text:span text:style-name="T333">├</text:span><text:span text:style-name="T334">──</text:span><text:s/>billing.ejs</text:p>
      <text:p text:style-name="Normal">│ <text:s text:c="2"/>│ <text:s text:c="2"/><text:span text:style-name="T335">├</text:span><text:span text:style-name="T336">──</text:span><text:s/>notifications.ejs</text:p>
      <text:p text:style-name="Normal">│ <text:s text:c="2"/>│ <text:s text:c="2"/>└── settings.ejs</text:p>
      <text:p text:style-name="Normal">│ <text:s text:c="2"/>│</text:p>
      <text:p text:style-name="Normal">│ <text:s text:c="2"/>└── admin/</text:p>
      <text:p text:style-name="Normal">│ <text:s text:c="6"/><text:span text:style-name="T337">├</text:span><text:span text:style-name="T338">──</text:span><text:s/>index.ejs</text:p>
      <text:p text:style-name="Normal">│ <text:s text:c="6"/><text:span text:style-name="T339">├</text:span><text:span text:style-name="T340">──</text:span><text:s/>users.ejs</text:p>
      <text:p text:style-name="Normal">│ <text:s text:c="6"/><text:span text:style-name="T341">├</text:span><text:span text:style-name="T342">──</text:span><text:s/>brands.ejs</text:p>
      <text:p text:style-name="Normal">│ <text:s text:c="6"/><text:span text:style-name="T343">├</text:span><text:span text:style-name="T344">──</text:span><text:s/>posts.ejs</text:p>
      <text:p text:style-name="Normal">│ <text:s text:c="6"/><text:span text:style-name="T345">├</text:span><text:span text:style-name="T346">──</text:span><text:s/>subscriptions.ejs</text:p>
      <text:p text:style-name="Normal">│ <text:s text:c="6"/><text:span text:style-name="T347">├</text:span><text:span text:style-name="T348">──</text:span><text:s/>payments.ejs</text:p>
      <text:p text:style-name="Normal">│ <text:s text:c="6"/><text:span text:style-name="T349">├</text:span><text:span text:style-name="T350">──</text:span><text:s/>api-usage.ejs</text:p>
      <text:p text:style-name="Normal">│ <text:s text:c="6"/><text:span text:style-name="T351">├</text:span><text:span text:style-name="T352">──</text:span><text:s/>ai-usage.ejs</text:p>
      <text:p text:style-name="Normal">│ <text:s text:c="6"/><text:span text:style-name="T353">├</text:span><text:span text:style-name="T354">──</text:span><text:s/>failed-posts.ejs</text:p>
      <text:p text:style-name="Normal">│ <text:s text:c="6"/><text:span text:style-name="T355">├</text:span><text:span text:style-name="T356">──</text:span><text:s/>templates.ejs</text:p>
      <text:p text:style-name="Normal">│ <text:s text:c="6"/><text:span text:style-name="T357">├</text:span><text:span text:style-name="T358">──</text:span><text:s/>reports.ejs</text:p>
      <text:p text:style-name="Normal">│ <text:s text:c="6"/><text:span text:style-name="T359">├</text:span><text:span text:style-name="T360">──</text:span><text:s/>audit-logs.ejs</text:p>
      <text:p text:style-name="Normal">│ <text:s text:c="6"/>└── settings.ejs</text:p>
      <text:p text:style-name="Normal">│</text:p>
      <text:p text:style-name="Normal"><text:span text:style-name="T361">├</text:span><text:span text:style-name="T362">──</text:span><text:s/>utils/</text:p>
      <text:p text:style-name="Normal">│ <text:s text:c="2"/><text:span text:style-name="T363">├</text:span><text:span text:style-name="T364">──</text:span><text:s/>generateSlug.js</text:p>
      <text:soft-page-break/>
      <text:p text:style-name="Normal">│ <text:s text:c="2"/><text:span text:style-name="T365">├</text:span><text:span text:style-name="T366">──</text:span><text:s/>formatDate.js</text:p>
      <text:p text:style-name="Normal">│ <text:s text:c="2"/><text:span text:style-name="T367">├</text:span><text:span text:style-name="T368">──</text:span><text:s/>platformRules.js</text:p>
      <text:p text:style-name="Normal">│ <text:s text:c="2"/><text:span text:style-name="T369">├</text:span><text:span text:style-name="T370">──</text:span><text:s/>contentScore.js</text:p>
      <text:p text:style-name="Normal">│ <text:s text:c="2"/><text:span text:style-name="T371">├</text:span><text:span text:style-name="T372">──</text:span><text:s/>encryptToken.js</text:p>
      <text:p text:style-name="Normal">│ <text:s text:c="2"/><text:span text:style-name="T373">├</text:span><text:span text:style-name="T374">──</text:span><text:s/>pagination.js</text:p>
      <text:p text:style-name="Normal">│ <text:s text:c="2"/>└── validators.js</text:p>
      <text:p text:style-name="Normal">│</text:p>
      <text:p text:style-name="Normal">└── seeds/</text:p>
      <text:p text:style-name="Normal"><text:s text:c="4"/><text:span text:style-name="T375">├</text:span><text:span text:style-name="T376">──</text:span><text:s/>adminSeed.js</text:p>
      <text:p text:style-name="Normal"><text:s text:c="4"/><text:span text:style-name="T377">├</text:span><text:span text:style-name="T378">──</text:span><text:s/>templateSeed.js</text:p>
      <text:p text:style-name="Normal"><text:s text:c="4"/>└── planSeed.js</text:p>
      <text:p text:style-name="Normal"><draw:custom-shape svg:x="0in" svg:y="0in" svg:width="45.51042in" svg:height="0.00139in" draw:z-index="0" draw:id="id29" draw:style-name="a29" draw:name="Horizontal Line 270" text:anchor-type="as-char"><svg:title/><svg:desc/><draw:enhanced-geometry draw:type="non-primitive" svg:viewBox="0 0 21600 21600" draw:enhanced-path="M 0 0 L 21600 0 21600 21600 0 21600 Z N"/></draw:custom-shape></text:p>
      <text:p text:style-name="P379">30. Mongoose models outline</text:p>
      <text:p text:style-name="P380">User model</text:p>
      <text:p text:style-name="Normal">{</text:p>
      <text:p text:style-name="Normal"><text:s text:c="2"/>name,</text:p>
      <text:p text:style-name="Normal"><text:s text:c="2"/>email,</text:p>
      <text:p text:style-name="Normal"><text:s text:c="2"/>password,</text:p>
      <text:p text:style-name="Normal"><text:s text:c="2"/>googleId,</text:p>
      <text:p text:style-name="Normal"><text:s text:c="2"/>avatar,</text:p>
      <text:p text:style-name="Normal"><text:s text:c="2"/>role,</text:p>
      <text:p text:style-name="Normal"><text:s text:c="2"/>plan,</text:p>
      <text:p text:style-name="Normal"><text:s text:c="2"/>isVerified,</text:p>
      <text:p text:style-name="Normal"><text:s text:c="2"/>status,</text:p>
      <text:p text:style-name="Normal"><text:s text:c="2"/>lastLogin,</text:p>
      <text:p text:style-name="Normal"><text:s text:c="2"/>createdAt</text:p>
      <text:p text:style-name="Normal">}</text:p>
      <text:p text:style-name="P381">Brand model</text:p>
      <text:p text:style-name="Normal">{</text:p>
      <text:p text:style-name="Normal"><text:s text:c="2"/>owner,</text:p>
      <text:p text:style-name="Normal"><text:s text:c="2"/>name,</text:p>
      <text:soft-page-break/>
      <text:p text:style-name="Normal"><text:s text:c="2"/>slug,</text:p>
      <text:p text:style-name="Normal"><text:s text:c="2"/>logo,</text:p>
      <text:p text:style-name="Normal"><text:s text:c="2"/>businessType,</text:p>
      <text:p text:style-name="Normal"><text:s text:c="2"/>description,</text:p>
      <text:p text:style-name="Normal"><text:s text:c="2"/>website,</text:p>
      <text:p text:style-name="Normal"><text:s text:c="2"/>location,</text:p>
      <text:p text:style-name="Normal"><text:s text:c="2"/>language,</text:p>
      <text:p text:style-name="Normal"><text:s text:c="2"/>targetAudience,</text:p>
      <text:p text:style-name="Normal"><text:s text:c="2"/>tone,</text:p>
      <text:p text:style-name="Normal"><text:s text:c="2"/>products,</text:p>
      <text:p text:style-name="Normal"><text:s text:c="2"/>offers,</text:p>
      <text:p text:style-name="Normal"><text:s text:c="2"/>preferredHashtags,</text:p>
      <text:p text:style-name="Normal"><text:s text:c="2"/>blockedWords,</text:p>
      <text:p text:style-name="Normal"><text:s text:c="2"/>goals,</text:p>
      <text:p text:style-name="Normal"><text:s text:c="2"/>brandColors,</text:p>
      <text:p text:style-name="Normal"><text:s text:c="2"/>status,</text:p>
      <text:p text:style-name="Normal"><text:s text:c="2"/>createdAt</text:p>
      <text:p text:style-name="Normal">}</text:p>
      <text:p text:style-name="P382">SocialAccount model</text:p>
      <text:p text:style-name="Normal">{</text:p>
      <text:p text:style-name="Normal"><text:s text:c="2"/>brand,</text:p>
      <text:p text:style-name="Normal"><text:s text:c="2"/>platform,</text:p>
      <text:p text:style-name="Normal"><text:s text:c="2"/>accountName,</text:p>
      <text:p text:style-name="Normal"><text:s text:c="2"/>accountId,</text:p>
      <text:p text:style-name="Normal"><text:s text:c="2"/>accessToken,</text:p>
      <text:p text:style-name="Normal"><text:s text:c="2"/>refreshToken,</text:p>
      <text:p text:style-name="Normal"><text:s text:c="2"/>tokenExpiresAt,</text:p>
      <text:p text:style-name="Normal"><text:s text:c="2"/>permissions,</text:p>
      <text:p text:style-name="Normal"><text:s text:c="2"/>status,</text:p>
      <text:p text:style-name="Normal"><text:s text:c="2"/>lastSyncAt,</text:p>
      <text:p text:style-name="Normal"><text:s text:c="2"/>createdAt</text:p>
      <text:soft-page-break/>
      <text:p text:style-name="Normal">}</text:p>
      <text:p text:style-name="P383">Post model</text:p>
      <text:p text:style-name="Normal">{</text:p>
      <text:p text:style-name="Normal"><text:s text:c="2"/>brand,</text:p>
      <text:p text:style-name="Normal"><text:s text:c="2"/>campaign,</text:p>
      <text:p text:style-name="Normal"><text:s text:c="2"/>platform,</text:p>
      <text:p text:style-name="Normal"><text:s text:c="2"/>type,</text:p>
      <text:p text:style-name="Normal"><text:s text:c="2"/>title,</text:p>
      <text:p text:style-name="Normal"><text:s text:c="2"/>caption,</text:p>
      <text:p text:style-name="Normal"><text:s text:c="2"/>hashtags,</text:p>
      <text:p text:style-name="Normal"><text:s text:c="2"/>media,</text:p>
      <text:p text:style-name="Normal"><text:s text:c="2"/>link,</text:p>
      <text:p text:style-name="Normal"><text:s text:c="2"/>status,</text:p>
      <text:p text:style-name="Normal"><text:s text:c="2"/>scheduledAt,</text:p>
      <text:p text:style-name="Normal"><text:s text:c="2"/>publishedAt,</text:p>
      <text:p text:style-name="Normal"><text:s text:c="2"/>platformPostId,</text:p>
      <text:p text:style-name="Normal"><text:s text:c="2"/>errorMessage,</text:p>
      <text:p text:style-name="Normal"><text:s text:c="2"/>retryCount,</text:p>
      <text:p text:style-name="Normal"><text:s text:c="2"/>createdBy,</text:p>
      <text:p text:style-name="Normal"><text:s text:c="2"/>approvedBy,</text:p>
      <text:p text:style-name="Normal"><text:s text:c="2"/>createdAt</text:p>
      <text:p text:style-name="Normal">}</text:p>
      <text:p text:style-name="P384">Campaign model</text:p>
      <text:p text:style-name="Normal">{</text:p>
      <text:p text:style-name="Normal"><text:s text:c="2"/>brand,</text:p>
      <text:p text:style-name="Normal"><text:s text:c="2"/>name,</text:p>
      <text:p text:style-name="Normal"><text:s text:c="2"/>goal,</text:p>
      <text:p text:style-name="Normal"><text:s text:c="2"/>description,</text:p>
      <text:p text:style-name="Normal"><text:s text:c="2"/>platforms,</text:p>
      <text:p text:style-name="Normal"><text:s text:c="2"/>startDate,</text:p>
      <text:p text:style-name="Normal"><text:s text:c="2"/>endDate,</text:p>
      <text:soft-page-break/>
      <text:p text:style-name="Normal"><text:s text:c="2"/>status,</text:p>
      <text:p text:style-name="Normal"><text:s text:c="2"/>posts,</text:p>
      <text:p text:style-name="Normal"><text:s text:c="2"/>createdAt</text:p>
      <text:p text:style-name="Normal">}</text:p>
      <text:p text:style-name="P385">Media model</text:p>
      <text:p text:style-name="Normal">{</text:p>
      <text:p text:style-name="Normal"><text:s text:c="2"/>brand,</text:p>
      <text:p text:style-name="Normal"><text:s text:c="2"/>uploadedBy,</text:p>
      <text:p text:style-name="Normal"><text:s text:c="2"/>fileName,</text:p>
      <text:p text:style-name="Normal"><text:s text:c="2"/>fileUrl,</text:p>
      <text:p text:style-name="Normal"><text:s text:c="2"/>publicId,</text:p>
      <text:p text:style-name="Normal"><text:s text:c="2"/>fileType,</text:p>
      <text:p text:style-name="Normal"><text:s text:c="2"/>size,</text:p>
      <text:p text:style-name="Normal"><text:s text:c="2"/>folder,</text:p>
      <text:p text:style-name="Normal"><text:s text:c="2"/>createdAt</text:p>
      <text:p text:style-name="Normal">}</text:p>
      <text:p text:style-name="P386">Analytics model</text:p>
      <text:p text:style-name="Normal">{</text:p>
      <text:p text:style-name="Normal"><text:s text:c="2"/>brand,</text:p>
      <text:p text:style-name="Normal"><text:s text:c="2"/>post,</text:p>
      <text:p text:style-name="Normal"><text:s text:c="2"/>platform,</text:p>
      <text:p text:style-name="Normal"><text:s text:c="2"/>views,</text:p>
      <text:p text:style-name="Normal"><text:s text:c="2"/>likes,</text:p>
      <text:p text:style-name="Normal"><text:s text:c="2"/>comments,</text:p>
      <text:p text:style-name="Normal"><text:s text:c="2"/>shares,</text:p>
      <text:p text:style-name="Normal"><text:s text:c="2"/>clicks,</text:p>
      <text:p text:style-name="Normal"><text:s text:c="2"/>reach,</text:p>
      <text:p text:style-name="Normal"><text:s text:c="2"/>engagementRate,</text:p>
      <text:p text:style-name="Normal"><text:s text:c="2"/>lastSyncedAt</text:p>
      <text:p text:style-name="Normal">}</text:p>
      <text:p text:style-name="Normal"><draw:custom-shape svg:x="0in" svg:y="0in" svg:width="45.51042in" svg:height="0.00139in" draw:z-index="0" draw:id="id30" draw:style-name="a30" draw:name="Horizontal Line 27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87">31. App pages and what each page does</text:p>
      <text:p text:style-name="P388">Public website</text:p>
      <text:p text:style-name="Normal">Home page</text:p>
      <text:p text:style-name="Normal">Features page</text:p>
      <text:p text:style-name="Normal">Pricing page</text:p>
      <text:p text:style-name="Normal">About page</text:p>
      <text:p text:style-name="Normal">Contact page</text:p>
      <text:p text:style-name="Normal">Terms page</text:p>
      <text:p text:style-name="Normal">Privacy page</text:p>
      <text:p text:style-name="P389">Auth pages</text:p>
      <text:p text:style-name="Normal">Login</text:p>
      <text:p text:style-name="Normal">Register</text:p>
      <text:p text:style-name="Normal">Google signup</text:p>
      <text:p text:style-name="Normal">Forgot password</text:p>
      <text:p text:style-name="Normal">Reset password</text:p>
      <text:p text:style-name="Normal">Email verification</text:p>
      <text:p text:style-name="P390">Dashboard pages</text:p>
      <text:p text:style-name="Normal">Dashboard home</text:p>
      <text:p text:style-name="Normal">Brands</text:p>
      <text:p text:style-name="Normal">Brand profile</text:p>
      <text:p text:style-name="Normal">AI generator</text:p>
      <text:p text:style-name="Normal">Campaign generator</text:p>
      <text:p text:style-name="Normal">Calendar</text:p>
      <text:p text:style-name="Normal">Drafts</text:p>
      <text:p text:style-name="Normal">Scheduled posts</text:p>
      <text:p text:style-name="Normal">Published posts</text:p>
      <text:p text:style-name="Normal">Failed posts</text:p>
      <text:p text:style-name="Normal">Media library</text:p>
      <text:p text:style-name="Normal">Video templates</text:p>
      <text:p text:style-name="Normal">Social accounts</text:p>
      <text:p text:style-name="Normal">Analytics</text:p>
      <text:soft-page-break/>
      <text:p text:style-name="Normal">Approvals</text:p>
      <text:p text:style-name="Normal">Team</text:p>
      <text:p text:style-name="Normal">Billing</text:p>
      <text:p text:style-name="Normal">Notifications</text:p>
      <text:p text:style-name="Normal">Settings</text:p>
      <text:p text:style-name="P391">Admin pages</text:p>
      <text:p text:style-name="Normal">Admin overview</text:p>
      <text:p text:style-name="Normal">Users</text:p>
      <text:p text:style-name="Normal">Brands</text:p>
      <text:p text:style-name="Normal">Posts</text:p>
      <text:p text:style-name="Normal">Subscriptions</text:p>
      <text:p text:style-name="Normal">Payments</text:p>
      <text:p text:style-name="Normal">API usage</text:p>
      <text:p text:style-name="Normal">AI usage</text:p>
      <text:p text:style-name="Normal">Failed posts</text:p>
      <text:p text:style-name="Normal">Reports</text:p>
      <text:p text:style-name="Normal">Templates</text:p>
      <text:p text:style-name="Normal">Audit logs</text:p>
      <text:p text:style-name="Normal">Settings</text:p>
      <text:p text:style-name="Normal"><draw:custom-shape svg:x="0in" svg:y="0in" svg:width="45.51042in" svg:height="0.00139in" draw:z-index="0" draw:id="id31" draw:style-name="a31" draw:name="Horizontal Line 272" text:anchor-type="as-char"><svg:title/><svg:desc/><draw:enhanced-geometry draw:type="non-primitive" svg:viewBox="0 0 21600 21600" draw:enhanced-path="M 0 0 L 21600 0 21600 21600 0 21600 Z N"/></draw:custom-shape></text:p>
      <text:p text:style-name="P392">32. Implementation stages</text:p>
      <text:p text:style-name="P393">Stage 1: Project foundation</text:p>
      <text:p text:style-name="Normal">Build:</text:p>
      <text:p text:style-name="Normal">Express app</text:p>
      <text:p text:style-name="Normal">MongoDB connection</text:p>
      <text:p text:style-name="Normal">EJS layout</text:p>
      <text:p text:style-name="Normal">CSS structure</text:p>
      <text:p text:style-name="Normal">Auth pages</text:p>
      <text:p text:style-name="Normal">Register/login/logout</text:p>
      <text:p text:style-name="Normal">Google login</text:p>
      <text:p text:style-name="Normal">Protected dashboard</text:p>
      <text:soft-page-break/>
      <text:p text:style-name="Normal">Admin role</text:p>
      <text:p text:style-name="Normal">Flash messages</text:p>
      <text:p text:style-name="Normal">Error pages</text:p>
      <text:p text:style-name="P394">Stage 2: Brand system</text:p>
      <text:p text:style-name="Normal">Build:</text:p>
      <text:p text:style-name="Normal">Create brand</text:p>
      <text:p text:style-name="Normal">Edit brand</text:p>
      <text:p text:style-name="Normal">Delete brand</text:p>
      <text:p text:style-name="Normal">Brand profile</text:p>
      <text:p text:style-name="Normal">Upload logo to Cloudinary</text:p>
      <text:p text:style-name="Normal">Brand Brain fields</text:p>
      <text:p text:style-name="Normal">Brand dashboard</text:p>
      <text:p text:style-name="P395">Stage 3: AI content generator</text:p>
      <text:p text:style-name="Normal">Build:</text:p>
      <text:p text:style-name="Normal">OpenAI connection</text:p>
      <text:p text:style-name="Normal">AI post generator</text:p>
      <text:p text:style-name="Normal">AI hashtag generator</text:p>
      <text:p text:style-name="Normal">AI CTA generator</text:p>
      <text:p text:style-name="Normal">AI image prompt generator</text:p>
      <text:p text:style-name="Normal">AI video script generator</text:p>
      <text:p text:style-name="Normal">Save AI result as draft</text:p>
      <text:p text:style-name="Normal">Usage limit checker</text:p>
      <text:p text:style-name="P396">Stage 4: Post management</text:p>
      <text:p text:style-name="Normal">Build:</text:p>
      <text:p text:style-name="Normal">Draft posts</text:p>
      <text:p text:style-name="Normal">Edit posts</text:p>
      <text:p text:style-name="Normal">Delete posts</text:p>
      <text:p text:style-name="Normal">Duplicate posts</text:p>
      <text:p text:style-name="Normal">Schedule posts</text:p>
      <text:p text:style-name="Normal">Post preview</text:p>
      <text:p text:style-name="Normal">Status management</text:p>
      <text:soft-page-break/>
      <text:p text:style-name="P397">Stage 5: Calendar</text:p>
      <text:p text:style-name="Normal">Build:</text:p>
      <text:p text:style-name="Normal">Monthly calendar</text:p>
      <text:p text:style-name="Normal">Weekly calendar</text:p>
      <text:p text:style-name="Normal">Scheduled posts list</text:p>
      <text:p text:style-name="Normal">Drag/change date later</text:p>
      <text:p text:style-name="Normal">Filter by brand/platform/status</text:p>
      <text:p text:style-name="P398">Stage 6: Facebook posting</text:p>
      <text:p text:style-name="Normal">Build:</text:p>
      <text:p text:style-name="Normal">Facebook OAuth</text:p>
      <text:p text:style-name="Normal">Connect Facebook Page</text:p>
      <text:p text:style-name="Normal">Store page token</text:p>
      <text:p text:style-name="Normal">Publish text post</text:p>
      <text:p text:style-name="Normal">Publish image post</text:p>
      <text:p text:style-name="Normal">Schedule Facebook post</text:p>
      <text:p text:style-name="Normal">Failed post logs</text:p>
      <text:p text:style-name="Normal">Retry failed posts</text:p>
      <text:p text:style-name="P399">Stage 7: Media library</text:p>
      <text:p text:style-name="Normal">Build:</text:p>
      <text:p text:style-name="Normal">Upload image/video</text:p>
      <text:p text:style-name="Normal">Cloudinary storage</text:p>
      <text:p text:style-name="Normal">Media grid</text:p>
      <text:p text:style-name="Normal">Search media</text:p>
      <text:p text:style-name="Normal">Use media in post</text:p>
      <text:p text:style-name="Normal">Delete media</text:p>
      <text:p text:style-name="P400">Stage 8: Cheap video templates</text:p>
      <text:p text:style-name="Normal">Build:</text:p>
      <text:p text:style-name="Normal">Video template list</text:p>
      <text:p text:style-name="Normal">Template preview</text:p>
      <text:p text:style-name="Normal">AI video script</text:p>
      <text:p text:style-name="Normal">Fill template with brand data</text:p>
      <text:soft-page-break/>
      <text:p text:style-name="Normal">Render/export video</text:p>
      <text:p text:style-name="Normal">Save video to Cloudinary</text:p>
      <text:p text:style-name="Normal">Use video in scheduled post</text:p>
      <text:p text:style-name="P401">Stage 9: Approval workflow</text:p>
      <text:p text:style-name="Normal">Build:</text:p>
      <text:p text:style-name="Normal">Send post for approval</text:p>
      <text:p text:style-name="Normal">Approve post</text:p>
      <text:p text:style-name="Normal">Reject post</text:p>
      <text:p text:style-name="Normal">Comment on post</text:p>
      <text:p text:style-name="Normal">Approval history</text:p>
      <text:p text:style-name="Normal">Client reviewer access</text:p>
      <text:p text:style-name="P402">Stage 10: Analytics</text:p>
      <text:p text:style-name="Normal">Build:</text:p>
      <text:p text:style-name="Normal">Post analytics</text:p>
      <text:p text:style-name="Normal">Brand analytics</text:p>
      <text:p text:style-name="Normal">Platform analytics</text:p>
      <text:p text:style-name="Normal">Campaign analytics</text:p>
      <text:p text:style-name="Normal">AI analytics summary</text:p>
      <text:p text:style-name="P403">Stage 11: Payments and plans</text:p>
      <text:p text:style-name="Normal">Build:</text:p>
      <text:p text:style-name="Normal">Plans</text:p>
      <text:p text:style-name="Normal">Subscriptions</text:p>
      <text:p text:style-name="Normal">Usage limits</text:p>
      <text:p text:style-name="Normal">Payment history</text:p>
      <text:p text:style-name="Normal">Upgrade/downgrade</text:p>
      <text:p text:style-name="Normal">AI credits</text:p>
      <text:p text:style-name="Normal">Video credits</text:p>
      <text:p text:style-name="P404">Stage 12: More platforms</text:p>
      <text:p text:style-name="Normal">Add:</text:p>
      <text:p text:style-name="Normal">Instagram</text:p>
      <text:p text:style-name="Normal">YouTube</text:p>
      <text:soft-page-break/>
      <text:p text:style-name="Normal">LinkedIn</text:p>
      <text:p text:style-name="Normal">TikTok</text:p>
      <text:p text:style-name="Normal">X/Twitter</text:p>
      <text:p text:style-name="Normal">Pinterest</text:p>
      <text:p text:style-name="Normal"><draw:custom-shape svg:x="0in" svg:y="0in" svg:width="45.51042in" svg:height="0.00139in" draw:z-index="0" draw:id="id32" draw:style-name="a32" draw:name="Horizontal Line 273" text:anchor-type="as-char"><svg:title/><svg:desc/><draw:enhanced-geometry draw:type="non-primitive" svg:viewBox="0 0 21600 21600" draw:enhanced-path="M 0 0 L 21600 0 21600 21600 0 21600 Z N"/></draw:custom-shape></text:p>
      <text:p text:style-name="P405">33. Environment variables</text:p>
      <text:p text:style-name="Normal">Your .env should include:</text:p>
      <text:p text:style-name="Normal">APP_NAME=AutoBrand AI</text:p>
      <text:p text:style-name="Normal">APP_URL=http://localhost:3000</text:p>
      <text:p text:style-name="Normal">PORT=3000</text:p>
      <text:p text:style-name="Normal"/>
      <text:p text:style-name="Normal">MONGO_URI=</text:p>
      <text:p text:style-name="Normal"/>
      <text:p text:style-name="Normal">SESSION_SECRET=</text:p>
      <text:p text:style-name="Normal">JWT_SECRET=</text:p>
      <text:p text:style-name="Normal"/>
      <text:p text:style-name="Normal">GOOGLE_CLIENT_ID=</text:p>
      <text:p text:style-name="Normal">GOOGLE_CLIENT_SECRET=</text:p>
      <text:p text:style-name="Normal">GOOGLE_CALLBACK_URL=http://localhost:3000/auth/google/callback</text:p>
      <text:p text:style-name="Normal"/>
      <text:p text:style-name="Normal">OPENAI_API_KEY=</text:p>
      <text:p text:style-name="Normal"/>
      <text:p text:style-name="Normal">CLOUDINARY_CLOUD_NAME=</text:p>
      <text:p text:style-name="Normal">CLOUDINARY_API_KEY=</text:p>
      <text:p text:style-name="Normal">CLOUDINARY_API_SECRET=</text:p>
      <text:p text:style-name="Normal"/>
      <text:p text:style-name="Normal">FACEBOOK_APP_ID=</text:p>
      <text:p text:style-name="Normal">FACEBOOK_APP_SECRET=</text:p>
      <text:p text:style-name="Normal">FACEBOOK_CALLBACK_URL=http://localhost:3000/social/facebook/callback</text:p>
      <text:p text:style-name="Normal"/>
      <text:p text:style-name="Normal">YOUTUBE_CLIENT_ID=</text:p>
      <text:soft-page-break/>
      <text:p text:style-name="Normal">YOUTUBE_CLIENT_SECRET=</text:p>
      <text:p text:style-name="Normal">YOUTUBE_CALLBACK_URL=http://localhost:3000/social/youtube/callback</text:p>
      <text:p text:style-name="Normal"/>
      <text:p text:style-name="Normal">INSTAGRAM_APP_ID=</text:p>
      <text:p text:style-name="Normal">INSTAGRAM_APP_SECRET=</text:p>
      <text:p text:style-name="Normal"/>
      <text:p text:style-name="Normal">REDIS_HOST=127.0.0.1</text:p>
      <text:p text:style-name="Normal">REDIS_PORT=6379</text:p>
      <text:p text:style-name="Normal"/>
      <text:p text:style-name="Normal">PAYMENT_PUBLIC_KEY=</text:p>
      <text:p text:style-name="Normal">PAYMENT_SECRET_KEY=</text:p>
      <text:p text:style-name="Normal"><draw:custom-shape svg:x="0in" svg:y="0in" svg:width="45.51042in" svg:height="0.00139in" draw:z-index="0" draw:id="id33" draw:style-name="a33" draw:name="Horizontal Line 274" text:anchor-type="as-char"><svg:title/><svg:desc/><draw:enhanced-geometry draw:type="non-primitive" svg:viewBox="0 0 21600 21600" draw:enhanced-path="M 0 0 L 21600 0 21600 21600 0 21600 Z N"/></draw:custom-shape></text:p>
      <text:p text:style-name="P406">34. Main backend routes</text:p>
      <text:p text:style-name="Normal">Use clean route files:</text:p>
      <text:p text:style-name="Normal">/auth</text:p>
      <text:p text:style-name="Normal">/dashboard</text:p>
      <text:p text:style-name="Normal">/brands</text:p>
      <text:p text:style-name="Normal">/posts</text:p>
      <text:p text:style-name="Normal">/ai</text:p>
      <text:p text:style-name="Normal">/campaigns</text:p>
      <text:p text:style-name="Normal">/calendar</text:p>
      <text:p text:style-name="Normal">/media</text:p>
      <text:p text:style-name="Normal">/templates</text:p>
      <text:p text:style-name="Normal">/social</text:p>
      <text:p text:style-name="Normal">/analytics</text:p>
      <text:p text:style-name="Normal">/approvals</text:p>
      <text:p text:style-name="Normal">/team</text:p>
      <text:p text:style-name="Normal">/billing</text:p>
      <text:p text:style-name="Normal">/admin</text:p>
      <text:p text:style-name="Normal">Example routes:</text:p>
      <text:p text:style-name="Normal">GET /dashboard</text:p>
      <text:soft-page-break/>
      <text:p text:style-name="Normal">GET /brands</text:p>
      <text:p text:style-name="Normal">POST /brands/create</text:p>
      <text:p text:style-name="Normal">GET /brands/:id</text:p>
      <text:p text:style-name="Normal">POST /brands/:id/update</text:p>
      <text:p text:style-name="Normal">POST /brands/:id/delete</text:p>
      <text:p text:style-name="Normal"/>
      <text:p text:style-name="Normal">GET /ai/generator</text:p>
      <text:p text:style-name="Normal">POST /ai/generate-post</text:p>
      <text:p text:style-name="Normal">POST /ai/generate-campaign</text:p>
      <text:p text:style-name="Normal">POST /ai/generate-hashtags</text:p>
      <text:p text:style-name="Normal">POST /ai/generate-video-script</text:p>
      <text:p text:style-name="Normal"/>
      <text:p text:style-name="Normal">GET /posts/drafts</text:p>
      <text:p text:style-name="Normal">POST /posts/create</text:p>
      <text:p text:style-name="Normal">POST /posts/:id/update</text:p>
      <text:p text:style-name="Normal">POST /posts/:id/schedule</text:p>
      <text:p text:style-name="Normal">POST /posts/:id/publish-now</text:p>
      <text:p text:style-name="Normal">POST /posts/:id/delete</text:p>
      <text:p text:style-name="Normal"/>
      <text:p text:style-name="Normal">GET /calendar</text:p>
      <text:p text:style-name="Normal">GET /media</text:p>
      <text:p text:style-name="Normal">POST /media/upload</text:p>
      <text:p text:style-name="Normal"/>
      <text:p text:style-name="Normal">GET /social/accounts</text:p>
      <text:p text:style-name="Normal">GET /social/facebook/connect</text:p>
      <text:p text:style-name="Normal">GET /social/facebook/callback</text:p>
      <text:p text:style-name="Normal"/>
      <text:p text:style-name="Normal">GET /admin</text:p>
      <text:p text:style-name="Normal">GET /admin/users</text:p>
      <text:p text:style-name="Normal">GET /admin/brands</text:p>
      <text:p text:style-name="Normal">GET /admin/failed-posts</text:p>
      <text:soft-page-break/>
      <text:p text:style-name="Normal"><draw:custom-shape svg:x="0in" svg:y="0in" svg:width="45.51042in" svg:height="0.00139in" draw:z-index="0" draw:id="id34" draw:style-name="a34" draw:name="Horizontal Line 275" text:anchor-type="as-char"><svg:title/><svg:desc/><draw:enhanced-geometry draw:type="non-primitive" svg:viewBox="0 0 21600 21600" draw:enhanced-path="M 0 0 L 21600 0 21600 21600 0 21600 Z N"/></draw:custom-shape></text:p>
      <text:p text:style-name="P407">35. UI design direction</text:p>
      <text:p text:style-name="Normal">Use your preferred clean style:</text:p>
      <text:p text:style-name="Normal">Clean</text:p>
      <text:p text:style-name="Normal">Classic</text:p>
      <text:p text:style-name="Normal">Rounded edges</text:p>
      <text:p text:style-name="Normal">White, black, dark blue</text:p>
      <text:p text:style-name="Normal">No many colors</text:p>
      <text:p text:style-name="Normal">Small/standard font size</text:p>
      <text:p text:style-name="Normal">Good spacing</text:p>
      <text:p text:style-name="Normal">Dark mode and light mode</text:p>
      <text:p text:style-name="Normal">Dashboard sidebar</text:p>
      <text:p text:style-name="Normal">Mobile sidebar menu</text:p>
      <text:p text:style-name="Normal">Cards with soft borders</text:p>
      <text:p text:style-name="Normal">Simple tables</text:p>
      <text:p text:style-name="Normal">Clean modals</text:p>
      <text:p text:style-name="P408">Main UI components</text:p>
      <text:p text:style-name="Normal">Navbar</text:p>
      <text:p text:style-name="Normal">Sidebar</text:p>
      <text:p text:style-name="Normal">Stats cards</text:p>
      <text:p text:style-name="Normal">Data tables</text:p>
      <text:p text:style-name="Normal">Post cards</text:p>
      <text:p text:style-name="Normal">Calendar cards</text:p>
      <text:p text:style-name="Normal">Modals</text:p>
      <text:p text:style-name="Normal">Forms</text:p>
      <text:p text:style-name="Normal">Tabs</text:p>
      <text:p text:style-name="Normal">Dropdowns</text:p>
      <text:p text:style-name="Normal">Toast messages</text:p>
      <text:p text:style-name="Normal">Pagination</text:p>
      <text:p text:style-name="Normal">Search/filter bars</text:p>
      <text:p text:style-name="Normal"><draw:custom-shape svg:x="0in" svg:y="0in" svg:width="45.51042in" svg:height="0.00139in" draw:z-index="0" draw:id="id35" draw:style-name="a35" draw:name="Horizontal Line 27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09">36. Best cost-saving rules</text:p>
      <text:p text:style-name="Normal">To avoid expensive API costs:</text:p>
      <text:p text:style-name="Normal">Use cheaper OpenAI model for normal captions</text:p>
      <text:p text:style-name="Normal">Limit monthly AI generations</text:p>
      <text:p text:style-name="Normal">Limit video rendering</text:p>
      <text:p text:style-name="Normal">Cache generated results</text:p>
      <text:p text:style-name="Normal">Do not regenerate unless user clicks regenerate</text:p>
      <text:p text:style-name="Normal">Use template videos instead of full AI videos</text:p>
      <text:p text:style-name="Normal">Make full AI video premium only</text:p>
      <text:p text:style-name="Normal">Track usage per user</text:p>
      <text:p text:style-name="Normal">Stop generation when plan limit is reached</text:p>
      <text:p text:style-name="P410">Credit system</text:p>
      <text:p text:style-name="Normal">Use credits:</text:p>
      <text:p text:style-name="Normal">1 text post = 1 credit</text:p>
      <text:p text:style-name="Normal">1 image prompt = 1 credit</text:p>
      <text:p text:style-name="Normal">1 campaign = 10 credits</text:p>
      <text:p text:style-name="Normal">1 template video = 20 credits</text:p>
      <text:p text:style-name="Normal">1 full AI video later = 100+ credits</text:p>
      <text:p text:style-name="Normal"><draw:custom-shape svg:x="0in" svg:y="0in" svg:width="45.51042in" svg:height="0.00139in" draw:z-index="0" draw:id="id36" draw:style-name="a36" draw:name="Horizontal Line 277" text:anchor-type="as-char"><svg:title/><svg:desc/><draw:enhanced-geometry draw:type="non-primitive" svg:viewBox="0 0 21600 21600" draw:enhanced-path="M 0 0 L 21600 0 21600 21600 0 21600 Z N"/></draw:custom-shape></text:p>
      <text:p text:style-name="P411">37. What makes your platform better than others</text:p>
      <text:p text:style-name="Normal">Your platform should stand out with these features:</text:p>
      <text:p text:style-name="Normal">AI Brand Brain</text:p>
      <text:p text:style-name="Normal">Local business mode</text:p>
      <text:p text:style-name="Normal">WhatsApp-ready content</text:p>
      <text:p text:style-name="Normal">Campaign generator</text:p>
      <text:p text:style-name="Normal">Auto-repurposing</text:p>
      <text:p text:style-name="Normal">Cheap template video system</text:p>
      <text:p text:style-name="Normal">AI content score</text:p>
      <text:p text:style-name="Normal">AI analytics explanation</text:p>
      <text:p text:style-name="Normal">Client approval workflow</text:p>
      <text:p text:style-name="Normal">Failed post auto-fix</text:p>
      <text:soft-page-break/>
      <text:p text:style-name="Normal">Multi-brand agency mode</text:p>
      <text:p text:style-name="Normal">Offer generator</text:p>
      <text:p text:style-name="Normal">Content calendar automation</text:p>
      <text:p text:style-name="Normal">Post duplication across platforms</text:p>
      <text:p text:style-name="Normal">Smart hashtag cleaner</text:p>
      <text:p text:style-name="Normal">Brand voice memory</text:p>
      <text:p text:style-name="Normal">The strongest unique feature for your market:</text:p>
      <text:p text:style-name="Normal">Local business mode + WhatsApp-ready content + cheap template videos</text:p>
      <text:p text:style-name="Normal">Because many small businesses need simple content they can post fast.</text:p>
      <text:p text:style-name="Normal"><draw:custom-shape svg:x="0in" svg:y="0in" svg:width="45.51042in" svg:height="0.00139in" draw:z-index="0" draw:id="id37" draw:style-name="a37" draw:name="Horizontal Line 278" text:anchor-type="as-char"><svg:title/><svg:desc/><draw:enhanced-geometry draw:type="non-primitive" svg:viewBox="0 0 21600 21600" draw:enhanced-path="M 0 0 L 21600 0 21600 21600 0 21600 Z N"/></draw:custom-shape></text:p>
      <text:p text:style-name="P412">38. MVP version to build first</text:p>
      <text:p text:style-name="Normal">Do not start with every API at once.</text:p>
      <text:p text:style-name="Normal">Build the first working version like this:</text:p>
      <text:p text:style-name="Normal">1. Auth</text:p>
      <text:p text:style-name="Normal">2. Dashboard</text:p>
      <text:p text:style-name="Normal">3. Brand profile</text:p>
      <text:p text:style-name="Normal">4. AI post generator</text:p>
      <text:p text:style-name="Normal">5. Save draft</text:p>
      <text:p text:style-name="Normal">6. Edit draft</text:p>
      <text:p text:style-name="Normal">7. Schedule post</text:p>
      <text:p text:style-name="Normal">8. Calendar</text:p>
      <text:p text:style-name="Normal">9. Media upload</text:p>
      <text:p text:style-name="Normal">10. Admin dashboard</text:p>
      <text:p text:style-name="Normal">Then connect:</text:p>
      <text:p text:style-name="Normal">11. Facebook Page auto-posting</text:p>
      <text:p text:style-name="Normal">12. Failed post retry</text:p>
      <text:p text:style-name="Normal">13. Analytics</text:p>
      <text:p text:style-name="Normal">14. Template videos</text:p>
      <text:p text:style-name="Normal">This way, you can start testing quickly.</text:p>
      <text:p text:style-name="Normal"><draw:custom-shape svg:x="0in" svg:y="0in" svg:width="45.51042in" svg:height="0.00139in" draw:z-index="0" draw:id="id38" draw:style-name="a38" draw:name="Horizontal Line 279" text:anchor-type="as-char"><svg:title/><svg:desc/><draw:enhanced-geometry draw:type="non-primitive" svg:viewBox="0 0 21600 21600" draw:enhanced-path="M 0 0 L 21600 0 21600 21600 0 21600 Z N"/></draw:custom-shape></text:p>
      <text:p text:style-name="P413">39. Final implementation order</text:p>
      <text:soft-page-break/>
      <text:p text:style-name="Normal">Follow this order exactly:</text:p>
      <text:p text:style-name="Normal">Phase 1: Foundation</text:p>
      <text:p text:style-name="Normal">- Setup Express app</text:p>
      <text:p text:style-name="Normal">- Setup MongoDB</text:p>
      <text:p text:style-name="Normal">- Setup EJS layouts</text:p>
      <text:p text:style-name="Normal">- Setup auth</text:p>
      <text:p text:style-name="Normal">- Setup dashboard UI</text:p>
      <text:p text:style-name="Normal"/>
      <text:p text:style-name="Normal">Phase 2: Brand Brain</text:p>
      <text:p text:style-name="Normal">- Create brand model</text:p>
      <text:p text:style-name="Normal">- Brand CRUD</text:p>
      <text:p text:style-name="Normal">- Cloudinary logo upload</text:p>
      <text:p text:style-name="Normal">- Brand profile page</text:p>
      <text:p text:style-name="Normal"/>
      <text:p text:style-name="Normal">Phase 3: AI Generator</text:p>
      <text:p text:style-name="Normal">- OpenAI service</text:p>
      <text:p text:style-name="Normal">- Generate captions</text:p>
      <text:p text:style-name="Normal">- Generate hashtags</text:p>
      <text:p text:style-name="Normal">- Generate image prompts</text:p>
      <text:p text:style-name="Normal">- Generate video scripts</text:p>
      <text:p text:style-name="Normal">- Save generated result</text:p>
      <text:p text:style-name="Normal"/>
      <text:p text:style-name="Normal">Phase 4: Posts</text:p>
      <text:p text:style-name="Normal">- Post model</text:p>
      <text:p text:style-name="Normal">- Draft posts</text:p>
      <text:p text:style-name="Normal">- Edit posts</text:p>
      <text:p text:style-name="Normal">- Delete posts</text:p>
      <text:p text:style-name="Normal">- Duplicate posts</text:p>
      <text:p text:style-name="Normal">- Schedule posts</text:p>
      <text:p text:style-name="Normal"/>
      <text:p text:style-name="Normal">Phase 5: Calendar</text:p>
      <text:soft-page-break/>
      <text:p text:style-name="Normal">- Calendar page</text:p>
      <text:p text:style-name="Normal">- Scheduled posts</text:p>
      <text:p text:style-name="Normal">- Status filters</text:p>
      <text:p text:style-name="Normal">- Brand/platform filters</text:p>
      <text:p text:style-name="Normal"/>
      <text:p text:style-name="Normal">Phase 6: Social Posting</text:p>
      <text:p text:style-name="Normal">- Facebook OAuth</text:p>
      <text:p text:style-name="Normal">- Connect Facebook Page</text:p>
      <text:p text:style-name="Normal">- Publish Facebook posts</text:p>
      <text:p text:style-name="Normal">- Queue scheduled posts</text:p>
      <text:p text:style-name="Normal">- Failed post retry</text:p>
      <text:p text:style-name="Normal"/>
      <text:p text:style-name="Normal">Phase 7: Media</text:p>
      <text:p text:style-name="Normal">- Cloudinary upload</text:p>
      <text:p text:style-name="Normal">- Media library</text:p>
      <text:p text:style-name="Normal">- Use media in posts</text:p>
      <text:p text:style-name="Normal"/>
      <text:p text:style-name="Normal">Phase 8: Video Templates</text:p>
      <text:p text:style-name="Normal">- Template model</text:p>
      <text:p text:style-name="Normal">- Template list</text:p>
      <text:p text:style-name="Normal">- AI script to template</text:p>
      <text:p text:style-name="Normal">- Render/export template videos</text:p>
      <text:p text:style-name="Normal"/>
      <text:p text:style-name="Normal">Phase 9: Approval</text:p>
      <text:p text:style-name="Normal">- Approval workflow</text:p>
      <text:p text:style-name="Normal">- Client reviewer</text:p>
      <text:p text:style-name="Normal">- Comments</text:p>
      <text:p text:style-name="Normal">- Approve/reject posts</text:p>
      <text:p text:style-name="Normal"/>
      <text:p text:style-name="Normal">Phase 10: Analytics</text:p>
      <text:p text:style-name="Normal">- Store analytics</text:p>
      <text:soft-page-break/>
      <text:p text:style-name="Normal">- Display charts</text:p>
      <text:p text:style-name="Normal">- AI performance summary</text:p>
      <text:p text:style-name="Normal"/>
      <text:p text:style-name="Normal">Phase 11: Billing</text:p>
      <text:p text:style-name="Normal">- Plans</text:p>
      <text:p text:style-name="Normal">- Usage limits</text:p>
      <text:p text:style-name="Normal">- Credits</text:p>
      <text:p text:style-name="Normal">- Payments</text:p>
      <text:p text:style-name="Normal"/>
      <text:p text:style-name="Normal">Phase 12: More Platforms</text:p>
      <text:p text:style-name="Normal">- Instagram</text:p>
      <text:p text:style-name="Normal">- YouTube</text:p>
      <text:p text:style-name="Normal">- LinkedIn</text:p>
      <text:p text:style-name="Normal">- TikTok</text:p>
      <text:p text:style-name="Normal">- X/Twitter</text:p>
      <text:p text:style-name="Normal"><draw:custom-shape svg:x="0in" svg:y="0in" svg:width="45.51042in" svg:height="0.00139in" draw:z-index="0" draw:id="id39" draw:style-name="a39" draw:name="Horizontal Line 280" text:anchor-type="as-char"><svg:title/><svg:desc/><draw:enhanced-geometry draw:type="non-primitive" svg:viewBox="0 0 21600 21600" draw:enhanced-path="M 0 0 L 21600 0 21600 21600 0 21600 Z N"/></draw:custom-shape></text:p>
      <text:p text:style-name="P414">40. Final summary</text:p>
      <text:p text:style-name="Normal">Your final platform is:</text:p>
      <text:p text:style-name="Normal">A multi-brand AI social media agent that creates, schedules, and publishes content automatically.</text:p>
      <text:p text:style-name="Normal">It will include:</text:p>
      <text:p text:style-name="Normal">AI post generation</text:p>
      <text:p text:style-name="Normal">AI campaign generation</text:p>
      <text:p text:style-name="Normal">AI video scripts</text:p>
      <text:p text:style-name="Normal">Cheap template videos</text:p>
      <text:p text:style-name="Normal">Cloudinary media storage</text:p>
      <text:p text:style-name="Normal">Facebook auto-posting</text:p>
      <text:p text:style-name="Normal">YouTube/Instagram later</text:p>
      <text:p text:style-name="Normal">Content calendar</text:p>
      <text:p text:style-name="Normal">Drafts</text:p>
      <text:p text:style-name="Normal">Approval workflow</text:p>
      <text:p text:style-name="Normal">Analytics</text:p>
      <text:soft-page-break/>
      <text:p text:style-name="Normal">Admin dashboard</text:p>
      <text:p text:style-name="Normal">Team members</text:p>
      <text:p text:style-name="Normal">Subscriptions</text:p>
      <text:p text:style-name="Normal">Usage limits</text:p>
      <text:p text:style-name="Normal">Use your existing stack:</text:p>
      <text:p text:style-name="Normal">Node.js</text:p>
      <text:p text:style-name="Normal">Express</text:p>
      <text:p text:style-name="Normal">MongoDB</text:p>
      <text:p text:style-name="Normal">Mongoose</text:p>
      <text:p text:style-name="Normal">EJS</text:p>
      <text:p text:style-name="Normal">HTML</text:p>
      <text:p text:style-name="Normal">CSS</text:p>
      <text:p text:style-name="Normal">JavaScript</text:p>
      <text:p text:style-name="Normal">Cloudinary</text:p>
      <text:p text:style-name="Normal">Google Login</text:p>
      <text:p text:style-name="Normal">OpenAI API</text:p>
      <text:p text:style-name="Normal">Best first build:</text:p>
      <text:p text:style-name="Normal">Auth + Dashboard + Brand Brain + AI Generator + Drafts + Scheduler + Calendar</text:p>
      <text:p text:style-name="Normal">Then add:</text:p>
      <text:p text:style-name="Normal">Facebook auto-posting</text:p>
      <text:p text:style-name="Normal">Cheap video templates</text:p>
      <text:p text:style-name="Normal">Analytics</text:p>
      <text:p text:style-name="Normal">Payments</text:p>
      <text:p text:style-name="Normal">More platform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Awan Mabur</meta:initial-creator>
    <dc:creator>Simon Awan Mabur</dc:creator>
    <meta:creation-date>2026-05-16T11:17:00Z</meta:creation-date>
    <dc:date>2026-05-16T11:20:00Z</dc:date>
    <meta:template xlink:href="Normal.dotm" xlink:type="simple"/>
    <meta:editing-cycles>1</meta:editing-cycles>
    <meta:editing-duration>PT180S</meta:editing-duration>
    <meta:document-statistic meta:page-count="50" meta:paragraph-count="52" meta:word-count="3905" meta:character-count="26115" meta:row-count="185" meta:non-whitespace-character-count="22262"/>
  </office:meta>
</office:document-meta>
</file>